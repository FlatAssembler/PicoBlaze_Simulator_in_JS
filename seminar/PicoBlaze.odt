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38000009248EAC15DC.jpg" manifest:media-type="image/jpeg"/>
  <manifest:file-entry manifest:full-path="Pictures/10000000000000E40000005F7CF5DC8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0000004380000092482D4C96E.jpg" manifest:media-type="image/jpeg"/>
  <manifest:file-entry manifest:full-path="Pictures/10000001000002F4000001CEB1AB246A.png" manifest:media-type="image/png"/>
  <manifest:file-entry manifest:full-path="Pictures/10000001000000C80000009FB7209775.gif" manifest:media-type="image/gif"/>
  <manifest:file-entry manifest:full-path="Pictures/10000001000002820000010152994F85.png" manifest:media-type="image/png"/>
  <manifest:file-entry manifest:full-path="Pictures/100000010000032200000274A354858F.png" manifest:media-type="image/png"/>
  <manifest:file-entry manifest:full-path="Pictures/100000010000028600000075B3DCD47E.png" manifest:media-type="image/png"/>
  <manifest:file-entry manifest:full-path="Pictures/10000000000003D4000000C162BBDB88.jpg" manifest:media-type="image/jpeg"/>
  <manifest:file-entry manifest:full-path="Pictures/1000000100000282000001B02ED475D3.png" manifest:media-type="image/png"/>
  <manifest:file-entry manifest:full-path="Pictures/1000000000000231000000D9E17DD36C.png" manifest:media-type="image/png"/>
  <manifest:file-entry manifest:full-path="Pictures/1000000000000267000001F70F2E2F09.png" manifest:media-type="image/png"/>
  <manifest:file-entry manifest:full-path="Pictures/10000001000003C2000000B4A865FF44.png" manifest:media-type="image/png"/>
  <manifest:file-entry manifest:full-path="Pictures/1000000100000780000003FC68545773.png" manifest:media-type="image/png"/>
  <manifest:file-entry manifest:full-path="Pictures/10000001000001C9000000DE38145D1D.png" manifest:media-type="image/png"/>
  <manifest:file-entry manifest:full-path="Pictures/100000000000043800000924420DCDEA.jpg" manifest:media-type="image/jpeg"/>
  <manifest:file-entry manifest:full-path="Pictures/10000001000001C2000000C6BF964996.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90000016E8B18D3DC.png" manifest:media-type="image/png"/>
  <manifest:file-entry manifest:full-path="Pictures/100000010000026C000001372C437D5C.png" manifest:media-type="image/png"/>
  <manifest:file-entry manifest:full-path="Pictures/100000010000026A0000013346490012.png" manifest:media-type="image/png"/>
  <manifest:file-entry manifest:full-path="Pictures/10000000000005CA000002FAFBFB53BA.jpg" manifest:media-type="image/jpeg"/>
  <manifest:file-entry manifest:full-path="Pictures/100000000000026A0000017842F2DD0B.png" manifest:media-type="image/png"/>
  <manifest:file-entry manifest:full-path="Pictures/100000000000043800000924D0962648.jpg" manifest:media-type="image/jpeg"/>
  <manifest:file-entry manifest:full-path="Pictures/1000000000000438000009242B4D8846.jpg" manifest:media-type="image/jpeg"/>
  <manifest:file-entry manifest:full-path="Pictures/1000000000000438000009240D7035A6.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lef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lef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lef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right"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right"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right"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lef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75d50" officeooo:paragraph-rsid="03675d50" style:font-size-asian="11pt" style:font-style-asian="normal" style:font-weight-asian="normal" style:font-size-complex="11pt" style:font-style-complex="normal" style:font-weight-complex="normal"/>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Footnote">
      <style:text-properties officeooo:rsid="010104cb" officeooo:paragraph-rsid="010104c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5"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7"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708bfd" style:font-size-asian="11pt" style:font-style-asian="normal" style:font-weight-asian="normal" style:font-size-complex="11pt" style:font-style-complex="normal" style:font-weight-complex="normal"/>
    </style:style>
    <style:style style:name="P98" style:family="paragraph" style:parent-style-name="Standard">
      <style:paragraph-properties fo:margin-left="0.5in" fo:margin-right="0in" fo:text-align="justify" style:justify-single-word="false" fo:text-indent="0in" style:auto-text-indent="false"/>
      <style:text-properties officeooo:paragraph-rsid="03708bfd"/>
    </style:style>
    <style:style style:name="P99" style:family="paragraph" style:parent-style-name="Standard">
      <style:paragraph-properties fo:margin-left="0.5in" fo:margin-right="0in" fo:text-align="left" style:justify-single-word="false" fo:text-indent="0in" style:auto-text-indent="false"/>
      <style:text-properties style:font-name="Courier New" fo:font-size="11pt" fo:language="hr" fo:country="HR" officeooo:rsid="03708bfd" officeooo:paragraph-rsid="03708bfd" style:font-size-asian="11pt" style:font-size-complex="11pt"/>
    </style:style>
    <style:style style:name="P100" style:family="paragraph" style:parent-style-name="Standard">
      <style:paragraph-properties fo:margin-left="0.5in" fo:margin-right="0in" fo:text-align="justify" style:justify-single-word="false" fo:text-indent="0in" style:auto-text-indent="false"/>
      <style:text-properties style:font-name="Liberation Serif" fo:font-size="11pt" fo:language="en" fo:country="US" officeooo:rsid="03708bfd" officeooo:paragraph-rsid="03708bfd" style:font-size-asian="11pt" style:font-size-complex="11pt"/>
    </style:style>
    <style:style style:name="P101" style:family="paragraph" style:parent-style-name="Standard">
      <style:paragraph-properties fo:margin-left="0.5in" fo:margin-right="0in" fo:text-align="left" style:justify-single-word="false" fo:text-indent="0in" style:auto-text-indent="false"/>
      <style:text-properties style:font-name="Courier New" fo:font-size="11pt" fo:language="en" fo:country="US" officeooo:rsid="03708bfd" officeooo:paragraph-rsid="03708bfd" style:font-size-asian="11pt" style:font-size-complex="11pt"/>
    </style:style>
    <style:style style:name="P102" style:family="paragraph" style:parent-style-name="Standard">
      <style:paragraph-properties fo:margin-left="0.5in" fo:margin-right="0in" fo:text-align="justify" style:justify-single-word="false" fo:text-indent="0in" style:auto-text-indent="false"/>
      <style:text-properties style:font-name="Times New Roman" fo:font-size="11pt" fo:language="en" fo:country="US" officeooo:rsid="037121e1" officeooo:paragraph-rsid="037121e1" style:font-size-asian="11pt" style:font-size-complex="11pt"/>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15"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16" style:family="paragraph" style:parent-style-name="Preformatted_20_Text">
      <style:paragraph-properties fo:line-height="100%"/>
    </style:style>
    <style:style style:name="P117" style:family="paragraph" style:parent-style-name="Preformatted_20_Text">
      <style:paragraph-properties fo:margin-top="0in" fo:margin-bottom="0in" style:contextual-spacing="false" fo:line-height="100%"/>
      <style:text-properties officeooo:paragraph-rsid="0324c9ff"/>
    </style:style>
    <style:style style:name="P118" style:family="paragraph" style:parent-style-name="Preformatted_20_Text">
      <style:paragraph-properties fo:margin-top="0in" fo:margin-bottom="0in" style:contextual-spacing="false"/>
      <style:text-properties officeooo:paragraph-rsid="0324c9ff"/>
    </style:style>
    <style:style style:name="P119" style:family="paragraph" style:parent-style-name="Preformatted_20_Text">
      <style:paragraph-properties fo:margin-top="0in" fo:margin-bottom="0in" style:contextual-spacing="false" fo:text-align="justify" style:justify-single-word="false"/>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2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2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3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1"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2"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3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3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cd918" officeooo:paragraph-rsid="036cd918" style:font-size-asian="11pt" style:font-style-asian="normal" style:font-weight-asian="normal" style:font-size-complex="11pt" style:font-style-complex="normal" style:font-weight-complex="normal"/>
    </style:style>
    <style:style style:name="P13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e9e5d" officeooo:paragraph-rsid="036e9e5d" style:font-size-asian="11pt" style:font-style-asian="normal" style:font-weight-asian="normal" style:font-size-complex="11pt" style:font-style-complex="normal" style:font-weight-complex="normal"/>
    </style:style>
    <style:style style:name="P13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f45ed" officeooo:paragraph-rsid="036f45ed"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officeooo:paragraph-rsid="036e9e5d"/>
    </style:style>
    <style:style style:name="P138" style:family="paragraph" style:parent-style-name="Standard">
      <style:paragraph-properties fo:text-align="justify" style:justify-single-word="false"/>
      <style:text-properties officeooo:rsid="02c66063" officeooo:paragraph-rsid="02c66063"/>
    </style:style>
    <style:style style:name="P139" style:family="paragraph" style:parent-style-name="Standard">
      <style:paragraph-properties fo:text-align="justify" style:justify-single-word="false"/>
      <style:text-properties officeooo:rsid="00650adb" officeooo:paragraph-rsid="00650adb"/>
    </style:style>
    <style:style style:name="P140" style:family="paragraph" style:parent-style-name="Footnote">
      <style:text-properties officeooo:rsid="00bfc4d3" officeooo:paragraph-rsid="00bfc4d3"/>
    </style:style>
    <style:style style:name="P141" style:family="paragraph" style:parent-style-name="Standard">
      <style:paragraph-properties fo:text-align="justify" style:justify-single-word="false"/>
      <style:text-properties officeooo:paragraph-rsid="00cd934b"/>
    </style:style>
    <style:style style:name="P142" style:family="paragraph" style:parent-style-name="Footnote">
      <style:text-properties fo:language="hr" fo:country="HR" officeooo:rsid="00d1ae23" officeooo:paragraph-rsid="00d1ae23"/>
    </style:style>
    <style:style style:name="P143" style:family="paragraph" style:parent-style-name="Preformatted_20_Text">
      <style:paragraph-properties fo:text-align="justify" style:justify-single-word="false"/>
      <style:text-properties officeooo:paragraph-rsid="00cd934b"/>
    </style:style>
    <style:style style:name="P144" style:family="paragraph" style:parent-style-name="Preformatted_20_Text">
      <style:paragraph-properties fo:text-align="justify" style:justify-single-word="false"/>
      <style:text-properties officeooo:paragraph-rsid="00d63138"/>
    </style:style>
    <style:style style:name="P145"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4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officeooo:paragraph-rsid="00162eee"/>
    </style:style>
    <style:style style:name="P150" style:family="paragraph" style:parent-style-name="Slika">
      <style:text-properties fo:font-size="10pt" style:font-size-asian="10pt" style:font-size-complex="10pt"/>
    </style:style>
    <style:style style:name="P151" style:family="paragraph" style:parent-style-name="Standard">
      <style:paragraph-properties fo:text-align="justify" style:justify-single-word="false"/>
      <style:text-properties officeooo:paragraph-rsid="00141c20"/>
    </style:style>
    <style:style style:name="P152" style:family="paragraph" style:parent-style-name="Text">
      <style:paragraph-properties fo:text-align="justify" style:justify-single-word="false"/>
      <style:text-properties fo:font-size="10pt" style:font-size-asian="10pt" style:font-size-complex="10pt"/>
    </style:style>
    <style:style style:name="P153" style:family="paragraph" style:parent-style-name="Standard">
      <style:paragraph-properties fo:text-align="justify" style:justify-single-word="false"/>
      <style:text-properties officeooo:paragraph-rsid="001833b3"/>
    </style:style>
    <style:style style:name="P154" style:family="paragraph" style:parent-style-name="Slika">
      <style:paragraph-properties fo:text-align="justify" style:justify-single-word="false"/>
      <style:text-properties fo:font-size="10pt" style:font-size-asian="10pt" style:font-size-complex="10pt"/>
    </style:style>
    <style:style style:name="P155" style:family="paragraph" style:parent-style-name="Standard">
      <style:paragraph-properties fo:text-align="justify" style:justify-single-word="false"/>
      <style:text-properties officeooo:paragraph-rsid="00a2870f"/>
    </style:style>
    <style:style style:name="P156" style:family="paragraph" style:parent-style-name="Standard">
      <style:paragraph-properties fo:text-align="justify" style:justify-single-word="false"/>
      <style:text-properties officeooo:rsid="002098dd" officeooo:paragraph-rsid="002098dd"/>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60" style:family="paragraph" style:parent-style-name="Preformatted_20_Text">
      <style:paragraph-properties fo:margin-top="0in" fo:margin-bottom="0in" style:contextual-spacing="false" fo:line-height="100%"/>
    </style:style>
    <style:style style:name="P161" style:family="paragraph" style:parent-style-name="Standard">
      <style:paragraph-properties fo:text-align="justify" style:justify-single-word="false"/>
      <style:text-properties style:font-name="Times New Roman" officeooo:rsid="0226d724" officeooo:paragraph-rsid="0226d724"/>
    </style:style>
    <style:style style:name="P162" style:family="paragraph" style:parent-style-name="Standard">
      <style:paragraph-properties fo:text-align="justify" style:justify-single-word="false"/>
      <style:text-properties style:font-name="Times New Roman" officeooo:rsid="01e8e2a6" officeooo:paragraph-rsid="01e8e2a6"/>
    </style:style>
    <style:style style:name="P163" style:family="paragraph" style:parent-style-name="Standard">
      <style:paragraph-properties fo:text-align="justify" style:justify-single-word="false"/>
      <style:text-properties style:font-name="Times New Roman" officeooo:rsid="02693c51" officeooo:paragraph-rsid="02693c51"/>
    </style:style>
    <style:style style:name="P164" style:family="paragraph" style:parent-style-name="Standard">
      <style:paragraph-properties fo:text-align="justify" style:justify-single-word="false"/>
      <style:text-properties officeooo:rsid="03288acb" officeooo:paragraph-rsid="03288acb"/>
    </style:style>
    <style:style style:name="P165"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style:font-name="Times New Roman" officeooo:rsid="0329a22d" officeooo:paragraph-rsid="032f45c7"/>
    </style:style>
    <style:style style:name="P167"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officeooo:paragraph-rsid="032f45c7"/>
    </style:style>
    <style:style style:name="P170" style:family="paragraph" style:parent-style-name="Standard">
      <style:paragraph-properties fo:text-align="justify" style:justify-single-word="false"/>
      <style:text-properties officeooo:rsid="033370ff" officeooo:paragraph-rsid="033370ff"/>
    </style:style>
    <style:style style:name="P171"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2"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3"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justify" style:justify-single-word="false"/>
      <style:text-properties style:font-name="Times New Roman" fo:font-size="11pt" fo:language="hr" fo:country="HR" fo:font-style="normal" fo:font-weight="normal" officeooo:rsid="03748c23" officeooo:paragraph-rsid="03748c23"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76" style:family="paragraph" style:parent-style-name="Standard">
      <style:paragraph-properties fo:text-align="justify" style:justify-single-word="false"/>
      <style:text-properties officeooo:paragraph-rsid="01052669"/>
    </style:style>
    <style:style style:name="P177"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justify" style:justify-single-word="false"/>
    </style:style>
    <style:style style:name="P179" style:family="paragraph" style:parent-style-name="Standard">
      <style:paragraph-properties fo:text-align="justify" style:justify-single-word="false"/>
      <style:text-properties officeooo:rsid="0003f69e" officeooo:paragraph-rsid="030cdd7c"/>
    </style:style>
    <style:style style:name="P180" style:family="paragraph" style:parent-style-name="Standard">
      <style:paragraph-properties fo:text-align="justify" style:justify-single-word="false"/>
      <style:text-properties officeooo:rsid="0131fa20" officeooo:paragraph-rsid="03748c23"/>
    </style:style>
    <style:style style:name="P181" style:family="paragraph" style:parent-style-name="Standard">
      <style:paragraph-properties fo:text-align="justify" style:justify-single-word="false"/>
      <style:text-properties style:font-name="Times New Roman" fo:font-size="11pt" fo:language="hr" fo:country="HR" fo:font-style="normal" fo:font-weight="normal" officeooo:rsid="03763cbc" officeooo:paragraph-rsid="03763cbc" style:font-size-asian="11pt" style:font-style-asian="normal" style:font-weight-asian="normal" style:font-size-complex="11pt" style:font-style-complex="normal" style:font-weight-complex="normal"/>
    </style:style>
    <style:style style:name="P182" style:family="paragraph" style:parent-style-name="Standard">
      <style:paragraph-properties fo:text-align="justify" style:justify-single-word="false"/>
      <style:text-properties style:font-name="Courier New" fo:font-size="11pt" fo:language="hr" fo:country="HR" fo:font-style="normal" fo:font-weight="normal" officeooo:rsid="03763cbc" officeooo:paragraph-rsid="03763cbc" style:font-size-asian="11pt" style:font-style-asian="normal" style:font-weight-asian="normal" style:font-size-complex="11pt" style:font-style-complex="normal" style:font-weight-complex="normal"/>
    </style:style>
    <style:style style:name="P183" style:family="paragraph" style:parent-style-name="Standard">
      <style:paragraph-properties fo:text-align="justify" style:justify-single-word="false"/>
      <style:text-properties style:font-name="Times New Roman" fo:font-size="11pt" fo:language="hr" fo:country="HR" fo:font-style="normal" fo:font-weight="normal" officeooo:rsid="03760749" officeooo:paragraph-rsid="03760749" style:font-size-asian="11pt" style:font-style-asian="normal" style:font-weight-asian="normal" style:font-size-complex="11pt" style:font-style-complex="normal" style:font-weight-complex="normal"/>
    </style:style>
    <style:style style:name="P18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8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8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87" style:family="paragraph" style:parent-style-name="Footnote">
      <style:text-properties style:font-name="Courier New" fo:language="hr" fo:country="HR" officeooo:rsid="00f90194" officeooo:paragraph-rsid="00f90194"/>
    </style:style>
    <style:style style:name="P18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8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90" style:family="paragraph" style:parent-style-name="Footnote">
      <style:text-properties style:font-name="Courier New" fo:language="hr" fo:country="HR" officeooo:rsid="0013748f" officeooo:paragraph-rsid="0013748f"/>
    </style:style>
    <style:style style:name="P191" style:family="paragraph" style:parent-style-name="Title">
      <style:paragraph-properties fo:margin-top="0.1665in" fo:margin-bottom="0.0835in" style:contextual-spacing="false" fo:break-before="page"/>
      <style:text-properties fo:language="hr" fo:country="HR" officeooo:paragraph-rsid="0013748f"/>
    </style:style>
    <style:style style:name="P192" style:family="paragraph" style:parent-style-name="Text_20_body">
      <style:paragraph-properties fo:margin-left="0in" fo:margin-right="0in" fo:margin-top="0in" fo:margin-bottom="0in" style:contextual-spacing="false" fo:text-align="justify" style:justify-single-word="false" fo:text-indent="0.3118in" style:auto-text-indent="false"/>
      <style:text-properties fo:font-size="11.5pt" officeooo:paragraph-rsid="0013748f" style:font-size-asian="11.5pt" style:font-size-complex="11.5pt"/>
    </style:style>
    <style:style style:name="P193"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013748f" style:font-size-asian="11.5pt" style:font-size-complex="11.5pt"/>
    </style:style>
    <style:style style:name="P194"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123c1dd" style:font-size-asian="11.5pt" style:font-size-complex="11.5pt"/>
    </style:style>
    <style:style style:name="P195" style:family="paragraph" style:parent-style-name="Footnote">
      <style:text-properties fo:language="hr" fo:country="HR"/>
    </style:style>
    <style:style style:name="P196"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fo:language="hr" fo:country="HR" officeooo:rsid="001e3faf" officeooo:paragraph-rsid="001e3faf" style:font-size-asian="11.5pt" style:font-size-complex="11.5pt"/>
    </style:style>
    <style:style style:name="P197" style:family="paragraph" style:parent-style-name="Footnote">
      <style:text-properties fo:language="hr" fo:country="HR" officeooo:rsid="001e3faf" officeooo:paragraph-rsid="001e3faf"/>
    </style:style>
    <style:style style:name="P198" style:family="paragraph" style:parent-style-name="Text_20_body">
      <loext:graphic-properties draw:fill="none"/>
      <style:paragraph-properties fo:margin-left="0in" fo:margin-right="0in" fo:margin-top="0in" fo:margin-bottom="0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font-size="11.5pt" fo:language="hr" fo:country="HR" fo:font-style="normal" officeooo:rsid="03417fe6" officeooo:paragraph-rsid="03417fe6" style:font-size-asian="11.5pt" style:font-style-asian="normal" style:font-size-complex="11.5pt" style:font-style-complex="normal" fo:hyphenate="true" fo:hyphenation-remain-char-count="2" fo:hyphenation-push-char-count="2" loext:hyphenation-no-caps="false" loext:hyphenation-no-last-word="false" loext:hyphenation-word-char-count="no-limit" loext:hyphenation-zone="no-limit"/>
    </style:style>
    <style:style style:name="P19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officeooo:rsid="036cd918"/>
    </style:style>
    <style:style style:name="T55" style:family="text">
      <style:text-properties fo:language="en" fo:country="US" officeooo:rsid="02890d0c"/>
    </style:style>
    <style:style style:name="T56" style:family="text">
      <style:text-properties fo:font-style="italic" officeooo:rsid="02890d0c" style:font-style-asian="italic" style:font-style-complex="italic"/>
    </style:style>
    <style:style style:name="T57" style:family="text">
      <style:text-properties style:font-name="Times New Roman" fo:font-style="italic" officeooo:rsid="029fbcd4" style:font-style-asian="italic" style:font-style-complex="italic"/>
    </style:style>
    <style:style style:name="T58" style:family="text">
      <style:text-properties style:font-name="Times New Roman" fo:language="hr" fo:country="HR" fo:font-style="italic" officeooo:rsid="029fbcd4" style:font-style-asian="italic" style:font-style-complex="italic"/>
    </style:style>
    <style:style style:name="T59" style:family="text">
      <style:text-properties style:font-name="Times New Roman" fo:language="hr" fo:country="HR" officeooo:rsid="029fbcd4"/>
    </style:style>
    <style:style style:name="T60" style:family="text">
      <style:text-properties style:font-name="Times New Roman" fo:language="hr" fo:country="HR" fo:font-style="normal" officeooo:rsid="029fbcd4" style:font-style-asian="normal" style:font-style-complex="normal"/>
    </style:style>
    <style:style style:name="T61" style:family="text">
      <style:text-properties officeooo:rsid="028d1438"/>
    </style:style>
    <style:style style:name="T62"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8" style:family="text">
      <style:text-properties style:font-name="Courier New"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2"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2"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9" style:family="text">
      <style:text-properties officeooo:rsid="03594d50" style:language-asian="hi" style:country-asian="IN" style:language-complex="hi" style:country-complex="IN"/>
    </style:style>
    <style:style style:name="T150" style:family="text">
      <style:text-properties fo:language="en" fo:country="US" officeooo:rsid="03594d50"/>
    </style:style>
    <style:style style:name="T151" style:family="text">
      <style:text-properties officeooo:rsid="0365bfe1"/>
    </style:style>
    <style:style style:name="T152" style:family="text">
      <style:text-properties officeooo:rsid="03700c15"/>
    </style:style>
    <style:style style:name="T15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1" style:family="text">
      <style:text-properties officeooo:rsid="035dd25e"/>
    </style:style>
    <style:style style:name="T182"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5"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7"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0"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6" style:family="text">
      <style:text-properties officeooo:rsid="0362bb06"/>
    </style:style>
    <style:style style:name="T19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1" style:family="text">
      <style:text-properties style:font-name="Times New Roman"/>
    </style:style>
    <style:style style:name="T222" style:family="text">
      <style:text-properties style:font-name="Times New Roman" style:font-size-complex="10pt"/>
    </style:style>
    <style:style style:name="T223" style:family="text">
      <style:text-properties style:font-name="Times New Roman" fo:font-style="italic" style:font-style-asian="italic" style:font-style-complex="italic"/>
    </style:style>
    <style:style style:name="T224" style:family="text">
      <style:text-properties style:font-name="Times New Roman" fo:font-style="normal" style:font-style-asian="normal" style:font-style-complex="normal"/>
    </style:style>
    <style:style style:name="T225" style:family="text">
      <style:text-properties style:font-name="Times New Roman" fo:font-style="normal" style:font-style-asian="normal" style:font-size-complex="10pt" style:font-style-complex="normal"/>
    </style:style>
    <style:style style:name="T226" style:family="text">
      <style:text-properties style:font-name="Times New Roman" fo:font-style="italic" style:text-underline-style="none" style:font-style-asian="italic" style:font-style-complex="italic"/>
    </style:style>
    <style:style style:name="T227" style:family="text">
      <style:text-properties style:font-name="Times New Roman" fo:language="hr" fo:country="HR" fo:font-style="normal" style:font-style-asian="normal" style:font-style-complex="normal"/>
    </style:style>
    <style:style style:name="T228" style:family="text">
      <style:text-properties style:font-name="Times New Roman" fo:language="hr" fo:country="HR" fo:font-style="normal" officeooo:rsid="01cd92a1" style:font-style-asian="normal" style:font-style-complex="normal"/>
    </style:style>
    <style:style style:name="T229" style:family="text">
      <style:text-properties style:font-name="Times New Roman" fo:language="hr" fo:country="HR" fo:font-style="italic" style:font-style-asian="italic" style:font-style-complex="italic"/>
    </style:style>
    <style:style style:name="T230" style:family="text">
      <style:text-properties style:font-name="Times New Roman" fo:language="hr" fo:country="HR" fo:font-style="normal" officeooo:rsid="0296a0a0" style:font-style-asian="normal" style:font-style-complex="normal"/>
    </style:style>
    <style:style style:name="T231" style:family="text">
      <style:text-properties style:font-name="Times New Roman" fo:language="hr" fo:country="HR" fo:font-style="italic" officeooo:rsid="0296a0a0" style:font-style-asian="italic" style:font-style-complex="italic"/>
    </style:style>
    <style:style style:name="T232" style:family="text">
      <style:text-properties style:font-name="Courier New" fo:language="hr" fo:country="HR" fo:font-style="normal" officeooo:rsid="0296a0a0" style:font-style-asian="normal" style:font-style-complex="normal"/>
    </style:style>
    <style:style style:name="T233" style:family="text">
      <style:text-properties style:font-name="Times New Roman" fo:language="hr" fo:country="HR" fo:font-style="normal" officeooo:rsid="029a22e4" style:font-style-asian="normal" style:font-style-complex="normal"/>
    </style:style>
    <style:style style:name="T234"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1"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3" style:family="text">
      <style:text-properties officeooo:rsid="035044dc"/>
    </style:style>
    <style:style style:name="T254" style:family="text">
      <style:text-properties officeooo:rsid="03530491"/>
    </style:style>
    <style:style style:name="T255" style:family="text">
      <style:text-properties style:font-name="Courier New" officeooo:rsid="03530491"/>
    </style:style>
    <style:style style:name="T256" style:family="text">
      <style:text-properties style:font-name="Times New Roman" fo:font-size="11pt" fo:language="hr" fo:country="HR" fo:font-style="normal" fo:font-weight="normal" officeooo:rsid="03708bfd" style:font-size-asian="11pt" style:font-style-asian="normal" style:font-weight-asian="normal" style:font-size-complex="11pt" style:font-style-complex="normal" style:font-weight-complex="normal"/>
    </style:style>
    <style:style style:name="T257" style:family="text">
      <style:text-properties style:font-name="Courier New" fo:font-size="11pt" style:font-size-asian="11pt" style:font-size-complex="11pt"/>
    </style:style>
    <style:style style:name="T258" style:family="text">
      <style:text-properties fo:font-size="11pt" style:font-size-asian="11pt" style:font-size-complex="11pt"/>
    </style:style>
    <style:style style:name="T259" style:family="text">
      <style:text-properties fo:font-size="11pt" fo:language="hr" fo:country="HR" officeooo:rsid="03708bfd" style:font-size-asian="11pt" style:font-size-complex="11pt"/>
    </style:style>
    <style:style style:name="T260" style:family="text">
      <style:text-properties fo:font-size="11pt" fo:language="en" fo:country="US" officeooo:rsid="03708bfd" style:font-size-asian="11pt" style:font-size-complex="11pt"/>
    </style:style>
    <style:style style:name="T261" style:family="text">
      <style:text-properties style:font-name="Courier New" fo:font-size="11pt" fo:language="hr" fo:country="HR" officeooo:rsid="03708bfd" style:font-size-asian="11pt" style:font-size-complex="11pt"/>
    </style:style>
    <style:style style:name="T262"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6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7"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8"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80"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81"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82"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6"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7"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weight="normal" style:font-size-asian="11pt" style:font-weight-asian="normal" style:font-size-complex="11pt" style:font-weight-complex="normal"/>
    </style:style>
    <style:style style:name="T32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22" style:family="text">
      <style:text-properties officeooo:rsid="0201499a"/>
    </style:style>
    <style:style style:name="T323" style:family="text">
      <style:text-properties style:font-name="Times New Roman" officeooo:rsid="0348276e"/>
    </style:style>
    <style:style style:name="T324" style:family="text">
      <style:text-properties officeooo:rsid="0348276e"/>
    </style:style>
    <style:style style:name="T325" style:family="text">
      <style:text-properties fo:font-style="italic" officeooo:rsid="0348276e" style:font-style-asian="italic" style:font-style-complex="italic"/>
    </style:style>
    <style:style style:name="T326" style:family="text">
      <style:text-properties style:font-name="Times New Roman" officeooo:rsid="0335c5f7"/>
    </style:style>
    <style:style style:name="T327" style:family="text">
      <style:text-properties officeooo:rsid="0335c5f7"/>
    </style:style>
    <style:style style:name="T328" style:family="text">
      <style:text-properties style:font-name="Times New Roman" officeooo:rsid="034bea3a"/>
    </style:style>
    <style:style style:name="T329" style:family="text">
      <style:text-properties style:font-name="Times New Roman" officeooo:rsid="03599c5f"/>
    </style:style>
    <style:style style:name="T330" style:family="text">
      <style:text-properties officeooo:rsid="03599c5f"/>
    </style:style>
    <style:style style:name="T331" style:family="text">
      <style:text-properties style:font-name="Times New Roman" officeooo:rsid="03374d2c"/>
    </style:style>
    <style:style style:name="T332" style:family="text">
      <style:text-properties style:font-name="Times New Roman" officeooo:rsid="03381b79"/>
    </style:style>
    <style:style style:name="T333" style:family="text">
      <style:text-properties style:font-name="Times New Roman" fo:font-style="italic" officeooo:rsid="03381b79" style:font-style-asian="italic" style:font-style-complex="italic"/>
    </style:style>
    <style:style style:name="T334" style:family="text">
      <style:text-properties style:font-name="Times New Roman" officeooo:rsid="033c7c48"/>
    </style:style>
    <style:style style:name="T335" style:family="text">
      <style:text-properties style:font-name="Times New Roman" officeooo:rsid="03392a16"/>
    </style:style>
    <style:style style:name="T336" style:family="text">
      <style:text-properties officeooo:rsid="033a8082"/>
    </style:style>
    <style:style style:name="T337" style:family="text">
      <style:text-properties officeooo:rsid="036e9e5d"/>
    </style:style>
    <style:style style:name="T33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41"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50"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5" style:family="text">
      <style:text-properties fo:font-style="normal" style:font-style-asian="normal" style:font-style-complex="normal"/>
    </style:style>
    <style:style style:name="T356" style:family="text">
      <style:text-properties fo:language="hr" fo:country="HR" fo:font-style="normal" style:font-style-asian="normal" style:font-style-complex="normal"/>
    </style:style>
    <style:style style:name="T357" style:family="text">
      <style:text-properties fo:language="hr" fo:country="HR" fo:font-style="italic" style:font-style-asian="italic" style:font-style-complex="italic"/>
    </style:style>
    <style:style style:name="T358" style:family="text">
      <style:text-properties style:font-name="Courier New" fo:language="hr" fo:country="HR" fo:font-style="normal" style:font-style-asian="normal" style:font-style-complex="normal"/>
    </style:style>
    <style:style style:name="T35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7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80"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82"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9"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91"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93" style:family="text">
      <style:text-properties officeooo:rsid="00b33d2f"/>
    </style:style>
    <style:style style:name="T394" style:family="text">
      <style:text-properties fo:color="#000000" loext:opacity="100%"/>
    </style:style>
    <style:style style:name="T395" style:family="text">
      <style:text-properties fo:color="#000000" loext:opacity="100%" officeooo:rsid="00b81050"/>
    </style:style>
    <style:style style:name="T396" style:family="text">
      <style:text-properties fo:color="#000000" loext:opacity="100%" style:font-name="Courier New1"/>
    </style:style>
    <style:style style:name="T397" style:family="text">
      <style:text-properties fo:color="#000000" loext:opacity="100%" fo:font-style="italic" style:font-style-asian="italic" style:font-style-complex="italic"/>
    </style:style>
    <style:style style:name="T398" style:family="text">
      <style:text-properties fo:color="#000000" loext:opacity="100%" style:font-name="Courier New1" style:font-family-complex="'Courier New'" style:font-family-generic-complex="system" style:font-pitch-complex="variable"/>
    </style:style>
    <style:style style:name="T399" style:family="text">
      <style:text-properties fo:color="#000000" loext:opacity="100%" officeooo:rsid="00b33d2f"/>
    </style:style>
    <style:style style:name="T400" style:family="text">
      <style:text-properties fo:color="#000000" loext:opacity="100%" fo:font-style="italic" officeooo:rsid="00b33d2f" style:font-style-asian="italic" style:font-style-complex="italic"/>
    </style:style>
    <style:style style:name="T401" style:family="text">
      <style:text-properties fo:color="#000000" loext:opacity="100%" officeooo:rsid="00e45dcc"/>
    </style:style>
    <style:style style:name="T402" style:family="text">
      <style:text-properties fo:color="#000000" loext:opacity="100%" officeooo:rsid="00e92387"/>
    </style:style>
    <style:style style:name="T403" style:family="text">
      <style:text-properties fo:color="#000000" loext:opacity="100%" style:font-name="Courier New" officeooo:rsid="00e45dcc"/>
    </style:style>
    <style:style style:name="T404"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5" style:family="text">
      <style:text-properties officeooo:rsid="00162eee"/>
    </style:style>
    <style:style style:name="T406"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7" style:family="text">
      <style:text-properties officeooo:rsid="00141c20"/>
    </style:style>
    <style:style style:name="T408" style:family="text">
      <style:text-properties officeooo:rsid="0014d6d9"/>
    </style:style>
    <style:style style:name="T409"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3"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8"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2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2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22" style:family="text">
      <style:text-properties officeooo:rsid="0021a129"/>
    </style:style>
    <style:style style:name="T423" style:family="text">
      <style:text-properties fo:font-style="italic" officeooo:rsid="0021a129" style:font-style-asian="italic" style:font-style-complex="italic"/>
    </style:style>
    <style:style style:name="T424" style:family="text">
      <style:text-properties officeooo:rsid="01166c78"/>
    </style:style>
    <style:style style:name="T425" style:family="text">
      <style:text-properties officeooo:rsid="011693be"/>
    </style:style>
    <style:style style:name="T426" style:family="text">
      <style:text-properties officeooo:rsid="01183c95"/>
    </style:style>
    <style:style style:name="T427" style:family="text">
      <style:text-properties officeooo:rsid="0161ca96"/>
    </style:style>
    <style:style style:name="T428" style:family="text">
      <style:text-properties officeooo:rsid="011a7c68"/>
    </style:style>
    <style:style style:name="T429" style:family="text">
      <style:text-properties style:font-name="Courier New" officeooo:rsid="011a7c68"/>
    </style:style>
    <style:style style:name="T430" style:family="text">
      <style:text-properties fo:font-style="italic" officeooo:rsid="011a7c68" style:font-style-asian="italic" style:font-style-complex="italic"/>
    </style:style>
    <style:style style:name="T431" style:family="text">
      <style:text-properties officeooo:rsid="01631a8b"/>
    </style:style>
    <style:style style:name="T432" style:family="text">
      <style:text-properties fo:font-style="italic" officeooo:rsid="01631a8b" style:font-style-asian="italic" style:font-style-complex="italic"/>
    </style:style>
    <style:style style:name="T433" style:family="text">
      <style:text-properties officeooo:rsid="01650a04"/>
    </style:style>
    <style:style style:name="T434" style:family="text">
      <style:text-properties fo:font-style="italic" officeooo:rsid="01650a04" style:font-style-asian="italic" style:font-style-complex="italic"/>
    </style:style>
    <style:style style:name="T435" style:family="text">
      <style:text-properties fo:language="en" fo:country="US" fo:font-style="italic" officeooo:rsid="01631a8b" style:language-asian="hi" style:country-asian="IN" style:font-style-asian="italic" style:language-complex="hi" style:country-complex="IN" style:font-style-complex="italic"/>
    </style:style>
    <style:style style:name="T436" style:family="text">
      <style:text-properties officeooo:rsid="018e5134"/>
    </style:style>
    <style:style style:name="T437" style:family="text">
      <style:text-properties style:font-name="Courier New" fo:font-style="italic" officeooo:rsid="01650a04" style:font-style-asian="italic" style:font-style-complex="italic"/>
    </style:style>
    <style:style style:name="T438" style:family="text">
      <style:text-properties style:font-name="Courier New" officeooo:rsid="01650a04"/>
    </style:style>
    <style:style style:name="T439" style:family="text">
      <style:text-properties officeooo:rsid="0168eebf"/>
    </style:style>
    <style:style style:name="T440" style:family="text">
      <style:text-properties officeooo:rsid="018ef6ec"/>
    </style:style>
    <style:style style:name="T441" style:family="text">
      <style:text-properties fo:font-style="italic" officeooo:rsid="018ef6ec" style:font-style-asian="italic" style:font-style-complex="italic"/>
    </style:style>
    <style:style style:name="T442" style:family="text">
      <style:text-properties officeooo:rsid="018f3684"/>
    </style:style>
    <style:style style:name="T443" style:family="text">
      <style:text-properties fo:font-style="italic" officeooo:rsid="018f3684" style:font-style-asian="italic" style:font-style-complex="italic"/>
    </style:style>
    <style:style style:name="T444" style:family="text">
      <style:text-properties officeooo:rsid="01902353"/>
    </style:style>
    <style:style style:name="T44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7"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8"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9"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5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1"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8"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60"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61"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4"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6"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7"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80" style:family="text">
      <style:text-properties officeooo:rsid="0329a22d"/>
    </style:style>
    <style:style style:name="T481" style:family="text">
      <style:text-properties officeooo:rsid="035b743d"/>
    </style:style>
    <style:style style:name="T482" style:family="text">
      <style:text-properties officeooo:rsid="01f0ee7c"/>
    </style:style>
    <style:style style:name="T483" style:family="text">
      <style:text-properties officeooo:rsid="01f356ff"/>
    </style:style>
    <style:style style:name="T484" style:family="text">
      <style:text-properties officeooo:rsid="01f912b6"/>
    </style:style>
    <style:style style:name="T48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8"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90"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92"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9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4"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500"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50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50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5" style:family="text">
      <style:text-properties style:font-name="Times New Roman" fo:font-size="11pt" fo:language="hr" fo:country="HR" fo:font-style="normal" fo:font-weight="normal" officeooo:rsid="03748c23" style:font-size-asian="11pt" style:font-style-asian="normal" style:font-weight-asian="normal" style:font-size-complex="11pt" style:font-style-complex="normal" style:font-weight-complex="normal"/>
    </style:style>
    <style:style style:name="T506" style:family="text">
      <style:text-properties style:font-name="Courier New" fo:font-size="11pt" fo:language="hr" fo:country="HR" fo:font-style="normal" fo:font-weight="normal" officeooo:rsid="03748c23" style:font-size-asian="11pt" style:font-style-asian="normal" style:font-weight-asian="normal" style:font-size-complex="11pt" style:font-style-complex="normal" style:font-weight-complex="normal"/>
    </style:style>
    <style:style style:name="T50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1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1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1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13" style:family="text">
      <style:text-properties officeooo:rsid="00276227"/>
    </style:style>
    <style:style style:name="T514" style:family="text">
      <style:text-properties officeooo:rsid="032df803"/>
    </style:style>
    <style:style style:name="T515" style:family="text">
      <style:text-properties officeooo:rsid="00f33bac"/>
    </style:style>
    <style:style style:name="T516" style:family="text">
      <style:text-properties officeooo:rsid="00f7f894"/>
    </style:style>
    <style:style style:name="T517" style:family="text">
      <style:text-properties officeooo:rsid="00f64a46"/>
    </style:style>
    <style:style style:name="T518" style:family="text">
      <style:text-properties officeooo:rsid="00f90194"/>
    </style:style>
    <style:style style:name="T519" style:family="text">
      <style:text-properties officeooo:rsid="011ccf83"/>
    </style:style>
    <style:style style:name="T520" style:family="text">
      <style:text-properties officeooo:rsid="02fc2025"/>
    </style:style>
    <style:style style:name="T52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22" style:family="text">
      <style:text-properties fo:language="en" fo:country="US" fo:font-style="italic" style:font-style-asian="italic" style:font-style-complex="italic"/>
    </style:style>
    <style:style style:name="T523" style:family="text">
      <style:text-properties fo:language="hr" fo:country="HR" fo:font-style="italic" officeooo:rsid="000e60ac" style:font-style-asian="italic" style:font-style-complex="italic"/>
    </style:style>
    <style:style style:name="T524" style:family="text">
      <style:text-properties fo:language="en" fo:country="US" fo:font-style="italic" officeooo:rsid="001b1913" style:font-style-asian="italic" style:font-style-complex="italic"/>
    </style:style>
    <style:style style:name="T525" style:family="text">
      <style:text-properties fo:language="hr" fo:country="HR" fo:font-style="italic" officeooo:rsid="000fbdb8" style:font-style-asian="italic" style:font-style-complex="italic"/>
    </style:style>
    <style:style style:name="T526" style:family="text">
      <style:text-properties fo:language="hr" fo:country="HR" fo:font-style="italic" officeooo:rsid="01052669" style:font-style-asian="italic" style:font-style-complex="italic"/>
    </style:style>
    <style:style style:name="T527" style:family="text">
      <style:text-properties fo:language="hr" fo:country="HR" fo:font-style="italic" officeooo:rsid="035b743d" style:font-style-asian="italic" style:font-style-complex="italic"/>
    </style:style>
    <style:style style:name="T528" style:family="text">
      <style:text-properties fo:language="hr" fo:country="HR" fo:font-style="italic" officeooo:rsid="03078be5" style:font-style-asian="italic" style:font-style-complex="italic"/>
    </style:style>
    <style:style style:name="T529" style:family="text">
      <style:text-properties fo:language="en" fo:country="US" fo:font-style="italic" officeooo:rsid="03078be5" style:font-style-asian="italic" style:font-style-complex="italic"/>
    </style:style>
    <style:style style:name="T530" style:family="text">
      <style:text-properties fo:language="hr" fo:country="HR" fo:font-style="italic" officeooo:rsid="033ee948" style:font-style-asian="italic" style:font-style-complex="italic"/>
    </style:style>
    <style:style style:name="T531" style:family="text">
      <style:text-properties fo:language="hr" fo:country="HR" fo:font-style="italic" officeooo:rsid="034bea3a" style:font-style-asian="italic" style:font-style-complex="italic"/>
    </style:style>
    <style:style style:name="T532" style:family="text">
      <style:text-properties fo:language="hr" fo:country="HR" fo:font-style="italic" officeooo:rsid="0363edba" style:font-style-asian="italic" style:font-style-complex="italic"/>
    </style:style>
    <style:style style:name="T533" style:family="text">
      <style:text-properties fo:language="hr" fo:country="HR" officeooo:rsid="00e92387"/>
    </style:style>
    <style:style style:name="T534" style:family="text">
      <style:text-properties fo:language="hr" fo:country="HR" fo:font-style="italic" style:font-style-asian="italic"/>
    </style:style>
    <style:style style:name="T535" style:family="text">
      <style:text-properties fo:language="hr" fo:country="HR" fo:font-style="normal" officeooo:rsid="0107f37f" style:font-style-asian="normal" style:font-style-complex="normal"/>
    </style:style>
    <style:style style:name="T536" style:family="text">
      <style:text-properties fo:language="hr" fo:country="HR" fo:font-style="italic" officeooo:rsid="0107f37f" style:font-style-asian="italic" style:font-style-complex="italic"/>
    </style:style>
    <style:style style:name="T537" style:family="text">
      <style:text-properties fo:language="hr" fo:country="HR" fo:font-style="normal" officeooo:rsid="010965ab" style:font-style-asian="normal" style:font-style-complex="normal"/>
    </style:style>
    <style:style style:name="T538" style:family="text">
      <style:text-properties fo:language="hr" fo:country="HR" officeooo:rsid="00edeeee"/>
    </style:style>
    <style:style style:name="T539" style:family="text">
      <style:text-properties fo:language="hr" fo:country="HR" officeooo:rsid="010965ab"/>
    </style:style>
    <style:style style:name="T540" style:family="text">
      <style:text-properties fo:language="hr" fo:country="HR" officeooo:rsid="00ed225a"/>
    </style:style>
    <style:style style:name="T541" style:family="text">
      <style:text-properties fo:language="hr" fo:country="HR" fo:font-style="italic" officeooo:rsid="01f912b6" style:font-style-asian="italic" style:font-style-complex="italic"/>
    </style:style>
    <style:style style:name="T542" style:family="text">
      <style:text-properties fo:language="hr" fo:country="HR" officeooo:rsid="01f912b6"/>
    </style:style>
    <style:style style:name="T543" style:family="text">
      <style:text-properties fo:language="hr" fo:country="HR" officeooo:rsid="0039b9c8"/>
    </style:style>
    <style:style style:name="T544" style:family="text">
      <style:text-properties fo:language="en" fo:country="US" fo:font-style="italic" officeooo:rsid="0107f37f" style:font-style-asian="italic" style:font-style-complex="italic"/>
    </style:style>
    <style:style style:name="T545" style:family="text">
      <style:text-properties fo:language="en" fo:country="US" fo:font-style="normal" officeooo:rsid="0107f37f" style:font-style-asian="normal" style:font-style-complex="normal"/>
    </style:style>
    <style:style style:name="T546" style:family="text">
      <style:text-properties fo:language="hr" fo:country="HR" fo:font-style="normal" officeooo:rsid="0123c1dd" style:font-style-asian="normal" style:font-style-complex="normal"/>
    </style:style>
    <style:style style:name="T547" style:family="text">
      <style:text-properties fo:language="hr" fo:country="HR" fo:font-style="italic" officeooo:rsid="0123c1dd" style:font-style-asian="italic" style:font-style-complex="italic"/>
    </style:style>
    <style:style style:name="T548" style:family="text">
      <style:text-properties fo:language="hr" fo:country="HR" fo:font-style="italic" officeooo:rsid="027143bd" style:font-style-asian="italic" style:font-style-complex="italic"/>
    </style:style>
    <style:style style:name="T549" style:family="text">
      <style:text-properties fo:language="hr" fo:country="HR" fo:font-style="normal" officeooo:rsid="027143bd" style:font-style-asian="normal" style:font-style-complex="normal"/>
    </style:style>
    <style:style style:name="T550"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5083in, 0in, 0.4299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9"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B7209775.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B1AB246A.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52994F85.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B3DCD47E.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A354858F.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text:span><text:span text:style-name="T54">4</text:span> datoteka, ukupno <text:span text:style-name="T52">4'000</text:span> redaka <text:span text:style-name="T55">(</text:span><text:span text:style-name="T42">dakle, balansirao sam između pravila koje smo učili na kolegiju</text:span><text:span text:style-name="T56"> Razvoj programske podrške po objektivno orijentiranim načelima, </text:span><text:span text:style-name="T42">da jedna datoteka treba biti najviše 100 redaka koda, i sugestije korisnika foruma </text:span><text:span text:style-name="T56">Philosophical Vegan</text:span><text:span text:style-name="T42"> zvanog </text:span><text:span text:style-name="T56">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7">Tele</text:span><text:span text:style-name="T58">pathyConspiracy</text:span><text:span text:style-name="T59">, poznat na mnogim drugim internetskim forumima kao </text:span><text:span text:style-name="T58">PoliticalVegan</text:span><text:span text:style-name="T59">, misli da se pravilo „</text:span><text:span text:style-name="T58">Jedna datoteka treba sadržavati najviše 100 redaka koda.</text:span><text:span text:style-name="T59">” odnosi na davno vrijeme dok editori još nisu podržavali </text:span><text:span text:style-name="T58">folding</text:span><text:span text:style-name="T60">, a da danas sav kôd treba biti u jednoj datoteci i da trebamo koristiti </text:span><text:span text:style-name="T58">folding</text:span><text:span text:style-name="T60"> da se snađemo u toj datoteci.</text:span></text:p></text:note-body></text:note></text:span><text:span text:style-name="T42">, radio sam nešto između, </text:span><text:span text:style-name="T61">kao i u compileru za svoj programski jezik</text:span><text:span text:style-name="T55">)</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2"> te to da se osvježeni registri i flagovi u tablici bojaju različitom bojom od onih koji nisu nedavno promijenili vrijednost </text:span><text:span text:style-name="T63">(što se radi pomoću </text:span><text:span text:style-name="T64">DOM as a state</text:span><text:span text:style-name="T63">,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5">(Jedan od nedostataka pravljenja web-aplikacija je to što su takve stvari, koje se lagano naprave u drugim okruženjima, na webu radi sigurnosti teške za napraviti.), </text:span><text:span text:style-name="T66">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7">Naknadno je dodano da </text:span><text:span text:style-name="T68">machineCode</text:span><text:span text:style-name="T67"> sadrži i polje </text:span><text:span text:style-name="T68">disableBreakpoint</text:span><text:span text:style-name="T22">, </text:span><text:span text:style-name="T67">koje, ako sadrži true, sprječava da se breakpoint okine na toj instrukciji, jer to ne želimo da se dogodi za sve naredbe u strojnom kodu koje dolaze od </text:span><text:span text:style-name="T68">print_string</text:span><text:span text:style-name="T67">, već samo za prvu naredbu koja dolazi od nje. </text:span><text:span text:style-name="T69">Točke prekida dodao sam na prijedlog profesora Tomislava Matića </text:span><text:span text:style-name="T70">mlađeg (koji predaje Digitalnu elektroniku)</text:span><text:span text:style-name="T69">.</text:span><text:span text:style-name="T22"> Datoteka </text:span><text:span text:style-name="T38">PicoBlaze.html</text:span><text:span text:style-name="T22"> ima 1'320 redaka koda. CSS koji se koristi je relativno primitivan (recimo, </text:span><text:span text:style-name="T70">medijski upiti koriste se samo za postavljanje pozadine i ribbona „</text:span><text:span text:style-name="T71">Fork me on GitHub</text:span><text:span text:style-name="T70">”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2">Naknadno sam datoteku </text:span><text:span text:style-name="T73">PicoBlaze.html</text:span><text:span text:style-name="T72"> razdijelio u datoteke </text:span><text:span text:style-name="T73">PicoBlaze.html</text:span><text:span text:style-name="T72"> (koja sada sadrži samo HTML te samo onaj JavaScript koji je potreban da se sakrije moja e-mail adresa od spambotova), </text:span><text:span text:style-name="T73">styles.css</text:span><text:span text:style-name="T72"> (koja sadrži CSS), </text:span><text:span text:style-name="T73">headerScript.js</text:span><text:span text:style-name="T72"> (koja sadrži deklaracije potrebne drugim datotekama te skriptu za ponovno postavljanje layouta ako prozor promijeni veličinu) i </text:span><text:span text:style-name="T73">footerScript.js</text:span><text:span text:style-name="T72"> (koja sadrži funkcije za počinjanje i završavanje simulacije te JavaScript koji stvara SVG-ove). </text:span><text:span text:style-name="T74">A 22. kolovoza 2023. godine izdvojio sam nizove s mnemonikama i pretprocesorskim direktivama iz datoteke </text:span><text:span text:style-name="T75">headerScript.js</text:span><text:span text:style-name="T74"> u zasebnu datoteku </text:span><text:span text:style-name="T76">koju sam nazvao</text:span><text:span text:style-name="T74"> </text:span><text:span text:style-name="T75">list_of_directives.js</text:span><text:span text:style-name="T74">,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7">call</text:span><text:span text:style-name="T37"> sprema stara vrijednost registra Program Counter </text:span><text:span text:style-name="T78">(PC), i iz kojeg naredba </text:span><text:span text:style-name="T77">return</text:span><text:span text:style-name="T78"> vadi novu vrijednost PC-a</text:span><text:span text:style-name="T37">. Naletio sam na problem da Firefox 52 </text:span><text:span text:style-name="T78">(prva verzija Firefoxa u kojoj je moj asembler i emulator za PicoBlaze do tada funkcionirao)</text:span><text:span text:style-name="T37"> ne podržava JavaScriptinu naredbu </text:span><text:span text:style-name="T79">toReversed</text:span><text:span text:style-name="T37">, koja stvara novi niz s preokrenutim sadržajem nekog niza, ali to sam riješio monkey-patchingom </text:span><text:span text:style-name="T78">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2">P</text:span><text:span text:style-name="T80">ri pisanju datoteke </text:span><text:span text:style-name="T81">PicoBlaze.html</text:span><text:span text:style-name="T80"> naletio sam na, koliko se sjećam, tri ozbiljnija problema. Prvi je bio to što sam u JavaScriptu pokušao napraviti da moj program sintaksno oboji (</text:span><text:span text:style-name="T82">syntax highlight</text:span><text:span text:style-name="T8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2">Highlight Assembly</text:span><text:span text:style-name="T80">” </text:span><text:span text:style-name="T83">koji korisnik stisne kad želi da mu se sintaksno oboji program, što je </text:span><text:span text:style-name="T84">relativno</text:span><text:span text:style-name="T83"> lagano za isprogramirati. </text:span><text:span text:style-name="T85">Otvorio sam pitanje o tom problemu na forumu o izradi programskih jezika</text:span><text:span text:style-name="T85"><text:note text:id="ftn5" text:note-class="footnote"><text:note-citation>5</text:note-citation><text:note-body><text:p text:style-name="P67">https://languagedesign.stackexchange.com/q/1681/330</text:p></text:note-body></text:note></text:span><text:span text:style-name="T85"> (jer pretpostavljam da su mnogi koji su izradili programski jezik napravili i editor za njega u JavaScriptu, pa su možda naletjeli na isti problem i uspjeli ga riješiti, pa će mi moći pomoći), pa su se moderatori žalili da mi je pitanje </text:span><text:span text:style-name="T86">off-topic</text:span><text:span text:style-name="T85">, i na forumu o programiranju općenito</text:span><text:span text:style-name="T85"><text:note text:id="ftn6" text:note-class="footnote"><text:note-citation>6</text:note-citation><text:note-body><text:p text:style-name="P67">https://stackoverflow.com/q/76566400/8902065</text:p></text:note-body></text:note></text:span><text:span text:style-name="T85">, na </text:span><text:span text:style-name="T87">kojem skoro tjedan dana</text:span><text:span text:style-name="T85"> nisam dobio nikakav odgovor. </text:span><text:span text:style-name="T87">Odgovor koji sam dobio na forumu o programiranju općenito predlaže mi da iskoristim to što je asemblerski kod u monospace fontu, pa da dodam još jedan transparentan </text:span><text:span text:style-name="T88">&lt;pre&gt;</text:span><text:span text:style-name="T87"> element ispred tog </text:span><text:span text:style-name="T88">&lt;pre&gt;</text:span><text:span text:style-name="T87"> elementa u koji se ukucava asemblerski kod, te da u tom transparentnom </text:span><text:span text:style-name="T88">&lt;pre&gt;</text:span><text:span text:style-name="T87"> elementu prikazujem highlightirani asemblerski kod. </text:span><text:span text:style-name="T89">Ne sviđa mi se baš ta ideja. Ako to napravim, sigurno ću slomiti kompatibilnost s WebPositiveom (jer on ignorira CSS naredbe da prikazuje asemblerski kod u monospace fontu), ako ne i s Firefoxom 52 </text:span><text:span text:style-name="T90">(u kojem monospace fontovi, kako se meni čini, nisu zapravo monospace)</text:span><text:span text:style-name="T89">.</text:span><text:span text:style-name="T83"> Druga dva problema </text:span><text:span text:style-name="T87">na koja sam naletio pišući </text:span><text:span text:style-name="T88">PicoBlaze.html</text:span><text:span text:style-name="T83"> bila su da su različiti internetski preglednici različito interpretirali CSS koji sam napisao. </text:span><text:span text:style-name="T91">Prvi od njih bilo je da su se </text:span><text:span text:style-name="T92">tooltipsi </text:span><text:span text:style-name="T91">koji se pojave kada korisnik prijeđe mišem preko gumba sa slikom (</text:span><text:span text:style-name="T92">play</text:span><text:span text:style-name="T91">, </text:span><text:span text:style-name="T92">pause</text:span><text:span text:style-name="T91">, </text:span><text:span text:style-name="T92">stop</text:span><text:span text:style-name="T91">, </text:span><text:span text:style-name="T92">single step</text:span><text:span text:style-name="T91"> i </text:span><text:span text:style-name="T92">fast forward</text:span><text:span text:style-name="T91">) dobro prikazivali u Firefoxu, ali su u Chromeu bili pomaknuti znatno u lijevo. Netko mi je na internetskom forumu predložio da to jednostavno mogu riješiti tako da u CSS pravila za gumbe dodam pravilo „</text:span><text:span text:style-name="T93">position: relative</text:span><text:span text:style-name="T91">”</text:span><text:span text:style-name="T91"><text:note text:id="ftn7" text:note-class="footnote"><text:note-citation>7</text:note-citation><text:note-body><text:p text:style-name="P67">https://stackoverflow.com/a/64995638/8902065</text:p></text:note-body></text:note></text:span><text:span text:style-name="T91">. Ne razumijem kako to rješenje funkcionira, ali izgleda da funkcionira. A drugi problem bio </text:span><text:span text:style-name="T94">je</text:span><text:span text:style-name="T91"> da WebPositive, internetski preglednik koji se dobije uz operativni sustav Haiku, blisko srodan Safariju </text:span><text:span text:style-name="T84">(i WebPositive i Safari baziraju se na WebKitu)</text:span><text:span text:style-name="T91">, nije stavljao onu svijetlosivu pozadinu na gumbe, pa su slova </text:span><text:span text:style-name="T94">na gumbima</text:span><text:span text:style-name="T91"> (</text:span><text:span text:style-name="T95">jer su onda to bila </text:span><text:span text:style-name="T91">crna slova na ljubičastoj pozadini) u njemu bila nečitka. No, kad sam u CSS </text:span><text:span text:style-name="T67">pravila za gumbove</text:span><text:span text:style-name="T91"> dodao „</text:span><text:span text:style-name="T93">background: #cccccc;</text:span><text:span text:style-name="T91">”, radilo je kako treba. </text:span><text:span text:style-name="T96">WebPositive još uvijek renderira neke stvari u mom PicoBlaze Simulatoru pogrešno, recimo, on asemblerske programe ne renderira u monospace fontu, i nema očitog načina da mu se zada da to napravi. </text:span><text:span text:style-name="T97">Isto tako, WebPositive krivo renderira SVG gradijente u ikonama</text:span><text:span text:style-name="T98"> play, pause, fast forward</text:span><text:span text:style-name="T97"> i</text:span><text:span text:style-name="T98"> single step</text:span><text:span text:style-name="T97">. </text:span><text:span text:style-name="T99">I to nije samo u mom simulatoru PicoBlazea, nego i drugdje na mojoj web-stranici, recimo, u WebPositiveu su strelice na dnu mog SVG PacMana</text:span><text:span text:style-name="T99"><text:note text:id="ftn8" text:note-class="footnote"><text:note-citation>8</text:note-citation><text:note-body><text:p text:style-name="P71">https://flatassembler.github.io/pacman.html</text:p></text:note-body></text:note></text:span><text:span text:style-name="T99"> nevidljive dok se na njih ne prijeđe mišem.</text:span><text:span text:style-name="T100"> </text:span><text:span text:style-name="T101">No, t</text:span><text:span text:style-name="T102">e stvari</text:span><text:span text:style-name="T101"> ne spriječava</text:span><text:span text:style-name="T102">ju</text:span><text:span text:style-name="T10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3">(iako u </text:span><text:span text:style-name="T104">Otteru</text:span><text:span text:style-name="T103">, </text:span><text:span text:style-name="T105">na primjer,</text:span><text:span text:style-name="T103"> moj SVG PacMan radi bez problema)</text:span><text:span text:style-name="T101">. </text:span><text:span text:style-name="T102">Nisam isprobao svoj PicoBlaze Simulator u Safariju i Operi, no ne očekujem tamo velike probleme. U svakom slučaju, mislim da svatko tko želi koristiti moj PicoBlaze Simulator </text:span><text:span text:style-name="T106">lako</text:span><text:span text:style-name="T102"> može na svoje računalo instalirati neki internetski preglednik u kojem se on može pokrenuti. </text:span><text:span text:style-name="T107">Sve do verzije v6.4.2 postojao je bug da se u gotovo svim mobilnim internetskim preglednicima, osim u Dophinu i u Operi Mini, layout pokida ukoliko korisnik prijeđe u landscape način rada i zatim ide scrollirati prema gore. Pet godina sam pretpostavljao da je to zbog toga što se tada poziva CSS, ali se JavaScript ne poziva, pa nije bilo jednostavnog rješenja osim potpunog refaktoriranja CSS-a. Međutim, kad sam dodao navigaciju i log-in forme, primijetio sam nešto zapanjujuće: layout se pokida tek kada dođemo do elementa kojem je postavljen </text:span><text:span text:style-name="T108">max-height</text:span><text:span text:style-name="T107"> u CSS-u na 100vh. Pa je li moguće da ti mobilni internetski preglednici zapravo tada pozivaju JavaScript, ali iz nekog razloga ignoriraju CSS-ovu naredbu </text:span><text:span text:style-name="T108">max-height</text:span><text:span text:style-name="T107">? Isprva sam tu ideju odbacio kao smiješnu, ali jedne sam je noći ipak odlučio isprobati (tako što sam napisao 20-ak redaka JavaScripta koji simuliraju rad CSS-ove naredbe </text:span><text:span text:style-name="T108">max-height</text:span><text:span text:style-name="T107">). I, gle čuda, radilo je.</text:span><text:span text:style-name="T109"> </text:span><text:span text:style-name="T110">U Firefoxu 52 ako se pokrene na Windowsima XP (ali, začudo, ne i ako se </text:span><text:span text:style-name="T111">ta ista verzija Firefoxa</text:span><text:span text:style-name="T110"> pokrene na Solarisu, </text:span><text:span text:style-name="T67">ili na ReactOS-u 0.4.15</text:span><text:span text:style-name="T110">) </text:span><text:span text:style-name="T112">&lt;div&gt;</text:span><text:span text:style-name="T110"> element s brojevima linija i </text:span><text:span text:style-name="T112">&lt;pre&gt;</text:span><text:span text:style-name="T110"> element u koji se ukucava asemblerski kôd imaju različite prorede, tako da linije koda i oznake </text:span><text:span text:style-name="T113">brojeva</text:span><text:span text:style-name="T110"> linija </text:span><text:soft-page-break/><text:span text:style-name="T110">nisu </text:span><text:span text:style-name="T114">alignirane</text:span><text:span text:style-name="T110">. </text:span><text:span text:style-name="T65">Nisam to uspio riješiti, </text:span><text:span text:style-name="T115">i, ustvari, nemam osjećaj ni da bih to trebao riješiti</text:span><text:span text:style-name="T65">. </text:span><text:span text:style-name="T115">Mislim da to nije moj bug, niti </text:span><text:span text:style-name="T116">da</text:span><text:span text:style-name="T115"> je bug u Firefoxu, nego da je to bug u operativnom sustavu Windows XP.</text:span><text:span text:style-name="T110"> </text:span><text:span text:style-name="T111">Slično tako, u nekim starijim verzijama Microsoft Edgea, baziranima na EdgeHTML-u (moderne verzije Microsoft Edgea baziraju se na Blinku, kao i Chrome), </text:span><text:span text:style-name="T117">&lt;div&gt;</text:span><text:span text:style-name="T111"> element s brojevima linija ne </text:span><text:span text:style-name="T118">scrollira</text:span><text:span text:style-name="T111"> se zajedno s onim </text:span><text:span text:style-name="T117">&lt;pre&gt;</text:span><text:span text:style-name="T111"> elementom u koji se ukucava asemblerski program. </text:span><text:span text:style-name="T65">Nisam ni to uspio riješiti.</text:span><text:span text:style-name="T111"> Tako da se u Firefoxu 52 pokrenutom na Windows XP-u i u nekim starijim verzijama Microsoft Edgea, u kojima moj simulator PicoBlazea inače radi, ne mogu koristiti točke prekida (</text:span><text:span text:style-name="T118">breakpoints</text:span><text:span text:style-name="T111">). </text:span><text:span text:style-name="T11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0">work-around</text:span><text:span text:style-name="T119">, koliko vidim, ne postoji u Microsoft Edgeu. </text:span><text:span text:style-name="T121">I još sam naletio na problem da sam, kad sam birao boje za 7-segmentne pokaznike, pazio da izgleda slično kao na pravom PicoBlazeu. I na ekranu na laptopu uistinu je tako izgledalo. Međutim, kad sam to isprobao na svom mobitelu </text:span><text:span text:style-name="T122">(na kojem je, izgleda, zasićenje boja znatno slabije)</text:span><text:span text:style-name="T121">,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3">Kad sam nakon tri godine pisao primjer „</text:span><text:span text:style-name="T124">Regbanks-Flags Test</text:span><text:span text:style-name="T123">”,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25">a</text:span><text:span text:style-name="T22"> u naredbi „</text:span><text:span text:style-name="T125">load s0, a</text:span><text:span text:style-name="T22">” heksadekadska </text:span><text:span text:style-name="T126">je</text:span><text:span text:style-name="T22"> konstanta </text:span><text:span text:style-name="T127">(</text:span><text:span text:style-name="T128">a</text:span><text:span text:style-name="T127"> je heksadekadski 10)</text:span><text:span text:style-name="T22">, i treba biti obojena isto kao token </text:span><text:span text:style-name="T125">0</text:span><text:span text:style-name="T22"> u naredbi „</text:span><text:span text:style-name="T125">load s0, 0</text:span><text:span text:style-name="T22">”, a ne kao u „</text:span><text:span text:style-name="T125">regbank a</text:span><text:span text:style-name="T22">”, gdje je </text:span><text:span text:style-name="T125">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29">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0">Za sada postoji jednostavan </text:span><text:span text:style-name="T131">work-around</text:span><text:span text:style-name="T130">: Kada su tokeni </text:span><text:span text:style-name="T132">a</text:span><text:span text:style-name="T130">, </text:span><text:span text:style-name="T132">b</text:span><text:span text:style-name="T130"> i </text:span><text:span text:style-name="T132">c</text:span><text:span text:style-name="T130"> heksadekadske konstante, možemo umjesto njih pisati </text:span><text:span text:style-name="T132">0a</text:span><text:span text:style-name="T130">, </text:span><text:span text:style-name="T132">0b</text:span><text:span text:style-name="T130"> i </text:span><text:span text:style-name="T132">0c</text:span><text:span text:style-name="T130">, i bit će obojane točno. Korisnik Discorda </text:span><text:span text:style-name="T131">ahnfelt</text:span><text:span text:style-name="T130">, autor programskog jezika Firefly, kaže mi da je on naletio na sličan problem pri sintaksnom bojanju svog programskog jezika. Predlaže mi da u sintaksnom highlighteru deklariram globalnu varijablu </text:span><text:span text:style-name="T132">lastHighlightedMnemonic</text:span><text:span text:style-name="T130">, da u nju spremam mnemonike prije nego što ih highlightiram, te da tokene </text:span><text:span text:style-name="T132">a</text:span><text:span text:style-name="T130"> i </text:span><text:span text:style-name="T132">b</text:span><text:span text:style-name="T130"> highlightiram </text:span><text:span text:style-name="T133">CSS</text:span><text:span text:style-name="T130"> klasom </text:span><text:span text:style-name="T132">flag</text:span><text:span text:style-name="T130"> samo ako je </text:span><text:span text:style-name="T132">lastHighlightedMnemonic</text:span><text:span text:style-name="T130"> jednak </text:span><text:span text:style-name="T132">regbank</text:span><text:span text:style-name="T130">, a </text:span><text:span text:style-name="T132">c</text:span><text:span text:style-name="T130"> samo ako je </text:span><text:span text:style-name="T132">lastHighlightedMnemonic</text:span><text:span text:style-name="T130"> jednak </text:span><text:span text:style-name="T132">jump</text:span><text:span text:style-name="T130">, </text:span><text:span text:style-name="T132">return</text:span><text:span text:style-name="T130"> ili </text:span><text:span text:style-name="T132">call</text:span><text:span text:style-name="T130">. No, primijetite da sintaksno bojanje koda ni tada ne bi bilo točno. U naredbi „</text:span><text:span text:style-name="T132">jump c</text:span><text:span text:style-name="T130">”, token </text:span><text:span text:style-name="T132">c</text:span><text:span text:style-name="T130"> je heksadekadska konstanta (naredba znači „</text:span><text:span text:style-name="T131">Skoči na 13. naredbu u EPROM-u.</text:span><text:span text:style-name="T130">”, jer je </text:span><text:span text:style-name="T132">c</text:span><text:span text:style-name="T130"> heksadekadski broj 12, a naredbe se broje od nule), a u naredbi „</text:span><text:span text:style-name="T132">jump c, abort</text:span><text:span text:style-name="T130">” token </text:span><text:span text:style-name="T132">c</text:span><text:span text:style-name="T130"> je zastavica </text:span><text:span text:style-name="T131">carry </text:span><text:span text:style-name="T130">(naredba znači: „</text:span><text:span text:style-name="T131">Ako je zastavica carry postavljena u jedinicu, skoči na label koji se zove </text:span><text:span text:style-name="T134">abort</text:span><text:span text:style-name="T131">.</text:span><text:span text:style-name="T130">”). </text:span><text:span text:style-name="T135">Da bismo znali je li </text:span><text:span text:style-name="T136">c</text:span><text:span text:style-name="T135"> u PicoBlazeovom asemblerskom kodu heksadekadska konstanta ili zastavica, ne moramo samo znati prethodni token, nego i idući. Takve stvari ne smetaju parseru, ali su noćna mora za sintaksno bojanje koda. </text:span><text:span text:style-name="T137">Kad sam, nekoliko tjedana nakon što sam napisao „</text:span><text:span text:style-name="T138">Regbanks-Flags Test</text:span><text:span text:style-name="T137">”, pisao primjer „</text:span><text:span text:style-name="T138">Preprocessor Test</text:span><text:span text:style-name="T137">”, uočio sam i problem da sintaksni highlighter nakon znakova veće (</text:span><text:span text:style-name="T139">&gt;</text:span><text:span text:style-name="T137">) i </text:span><text:soft-page-break/><text:span text:style-name="T137">manje (</text:span><text:span text:style-name="T139">&lt;</text:span><text:span text:style-name="T137">) umeće točka-zarez (</text:span><text:span text:style-name="T139">;</text:span><text:span text:style-name="T137">), čineći programe koji koriste te operatore sintaksno netočnima. Nisam točnije dijagnosticirao problem, samo sam o tome dodao upozorenje na početak programa „</text:span><text:span text:style-name="T138">Preprocessor Test</text:span><text:span text:style-name="T137">”. </text:span><text:span text:style-name="T140">Naknadno sam još i dodao da </text:span><text:span text:style-name="T141">syntax highlighter</text:span><text:span text:style-name="T140"> odbija </text:span><text:span text:style-name="T141">highlightirati</text:span><text:span text:style-name="T140"> programe koji sadrže znakove </text:span><text:span text:style-name="T142">&lt;</text:span><text:span text:style-name="T140">, </text:span><text:span text:style-name="T142">&gt;</text:span><text:span text:style-name="T140"> i </text:span><text:span text:style-name="T142">&amp;</text:span><text:span text:style-name="T140">, s porukom o pogrešci: „</text:span><text:span text:style-name="T141">Sorry about that, but syntax highlighting of the programs containing `&lt;`, `&amp;`, and `&gt;` is not supported yet.</text:span><text:span text:style-name="T140">”, </text:span><text:span text:style-name="T143">te sam tražio pomoć s time na nekoliko internetskih foruma</text:span><text:span text:style-name="T143"><text:note text:id="ftn9" text:note-class="footnote"><text:note-citation>9</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3"> </text:span><text:span text:style-name="T143"><text:note text:id="ftn10" text:note-class="footnote"><text:note-citation>10</text:note-citation><text:note-body><text:p text:style-name="P67">https://www.forum.hr/showpost.php?p=99274899</text:p></text:note-body></text:note></text:span><text:span text:style-name="T143"><text:s/></text:span><text:span text:style-name="T143"><text:note text:id="ftn11" text:note-class="footnote"><text:note-citation>11</text:note-citation><text:note-body><text:p text:style-name="P67">https://philosophicalvegan.com/viewtopic.php?p=51800#p51800</text:p></text:note-body></text:note></text:span><text:span text:style-name="T143">, ali tu pomoć za sada nisam dobio</text:span><text:span text:style-name="T140">. </text:span><text:span text:style-name="T144">Nedavno je moj suradnik sa sveučilišta u Argentini </text:span><text:span text:style-name="T145">agustiza</text:span><text:span text:style-name="T144"> otkrio još jedan problem u </text:span><text:span text:style-name="T146">PicoBlaze.html</text:span><text:span text:style-name="T144">-u, naime, da način na koji sam napisao CSS uzrokuje layout trashing i usporava cijeli program oko 12 puta, a više o tome možete pročitati na kraju ovog teksta. </text:span><text:span text:style-name="T147">Kasnije sam uočio da Firefox 52 ignorira CSS naredbu </text:span><text:span text:style-name="T148">margin-right</text:span><text:span text:style-name="T147">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49">Onaj banner za cookieje se u Dolphinu ne vidi opet sve dok se ručno ne obrišu svi cookieji.</text:span><text:span text:style-name="T150"> </text:span>Otvorio sam pitanje o tome na Quori<text:note text:id="ftn12" text:note-class="footnote"><text:note-citation>12</text:note-citation><text:note-body><text:p text:style-name="P67">https://qr.ae/pCt6Uv</text:p></text:note-body></text:note>. <text:span text:style-name="T151">I godinama nakon što sam diplomirao, otkrio sam da se sličan taj problem s exportiranjem heksadecimalnih datoteka koji se pojavljuje u WebPositiveu pojavljuje i u njemu bliskom srodniku Dolphinu na Androidu (oboje su bazirani na WebKitu). Međutim, za razliku od WebPositivea koji se zaglavi kada se pokuša eksportirati heksadecimalna datoteka iz JavaScripta i mora ga se restartirati da bi se ovaj simulator PicoBlazea mogao nastaviti koristiti, Dolphin samo nakratko pokaže ovakvu poruku i nastavi s radom, bez potrebe za restartiranjem:</text:span></text:p>
          <text:p text:style-name="P78"><draw:frame draw:style-name="fr6" draw:name="Image22" text:anchor-type="as-char" svg:width="6.1807in" svg:height="1.0409in" draw:z-index="25"><draw:image xlink:href="Pictures/10000000000003D4000000C162BBDB88.jpg" xlink:type="simple" xlink:show="embed" xlink:actuate="onLoad" draw:mime-type="image/jpeg"/></draw:frame></text:p>
          <text:p text:style-name="P79">Ali to za Dolphin i nije toliki problem budući da se na Androidu i tako heksadecimalna datoteka ne može (koliko ja znam) ničim otvoriti. <text:span text:style-name="T152">Opera Mini dopušta da se skida ta HEX datoteka, ali ona onda bude korumpirana. Opet, nije veliki problem kad se na Androidu i tako ne može koristiti.</text:span></text:p>
          <text:p text:style-name="P80"><text:span text:style-name="T153">Dok sam pisao potprogram </text:span><text:span text:style-name="T154">PicoBlaze.html</text:span><text:span text:style-name="T153">, b</text:span><text:span text:style-name="T22">ilo je i nekih problema za koje sam bio siguran da ću naletjeti na njih, a zapravo nisam naletio. Recimo, </text:span><text:span text:style-name="T155">bio</text:span><text:span text:style-name="T22"> sam </text:span><text:span text:style-name="T155">uvjeren</text:span><text:span text:style-name="T22"> da će TOR Browser odbijati </text:span><text:span text:style-name="T7">fetchati</text:span><text:span text:style-name="T22"> PicoBlazeove asemblerske programe s mog GitHub profila (s domene </text:span><text:span text:style-name="T125">raw.githubusercontent.com</text:span><text:span text:style-name="T22">) </text:span><text:span text:style-name="T156">iz JavaScripta koji se nalazi na mojoj web-stranici (na domeni </text:span><text:span text:style-name="T157">flatassembler.github.io</text:span><text:span text:style-name="T156">), da je to jedan od načina na koji TOR Browser štiti od </text:span><text:span text:style-name="T158">cross-site scripting</text:span><text:span text:style-name="T156"> napada. </text:span><text:span text:style-name="T159">Međutim, kada sam to </text:span><text:span text:style-name="T160">fetchanje</text:span><text:span text:style-name="T159"> primjera asemblerskih programa isprobao u TOR Browseru, radilo je. </text:span><text:span text:style-name="T161">Otvorio sam </text:span><text:span text:style-name="T162">thread</text:span><text:span text:style-name="T161"> na forumu o tome</text:span><text:span text:style-name="T161"><text:note text:id="ftn13" text:note-class="footnote"><text:note-citation>13</text:note-citation><text:note-body><text:p text:style-name="P67">https://www.reddit.com/r/TOR/comments/jv3dln/tor_browser_appears_to_allow_crosssite_scripting/?utm_source=share&amp;utm_medium=web2x&amp;context=3</text:p></text:note-body></text:note></text:span><text:span text:style-name="T161">. U svakom slučaju, TOR Browser ne </text:span><text:soft-page-break/><text:span text:style-name="T161">pruža zaštitu koju sam mislio da pruža. </text:span><text:span text:style-name="T163">Mislim da je sigurnost koju pružaju internetski preglednici dosta nekonzistentna. </text:span><text:span text:style-name="T164">Izgleda, recimo, da je dohvaćanje JSON-a s primjerima s </text:span><text:span text:style-name="T165">nečijeg</text:span><text:span text:style-name="T164"> GitHub profila </text:span><text:span text:style-name="T165">(istina, internetski preglednik ne može znati da je to moj GitHub profil </text:span><text:span text:style-name="T166">i da ja imam kontrolu nad tim JSON-om</text:span><text:span text:style-name="T165">)</text:span><text:span text:style-name="T164"> toliko rizično da će svaki moderni internetski preglednik odbiti to napraviti </text:span><text:span text:style-name="T165">(morao sam </text:span><text:span text:style-name="T166">zbog tog</text:span><text:span text:style-name="T165"> taj JSON kopirati sa svog GitHub profila na svoju web-stranicu)</text:span><text:span text:style-name="T164">. </text:span><text:span text:style-name="T165">Ali dohvaćati PicoBlaze asemblerske programe s nečijeg GitHub profila i nesanitizirane ih postavljati kao </text:span><text:span text:style-name="T167">innerHTML</text:span><text:span text:style-name="T165"> toliko je sigurno da će to dopustiti čak i internetski preglednici koji su napravljeni da budu iznimno sigurni, kao što je TOR Browser. </text:span><text:span text:style-name="T168">Zar nije dohvaćati nešto što ćeš nesanitiz</text:span><text:span text:style-name="T169">i</text:span><text:span text:style-name="T168">rano postaviti kao </text:span><text:span text:style-name="T170">innerHTML</text:span><text:span text:style-name="T168"> iz nečega što se percipira kao nepouzdan izvor zapravo još opasnije nego dohvaćati JSON </text:span><text:span text:style-name="T171">iz tog izvora</text:span><text:span text:style-name="T168">? </text:span><text:span text:style-name="T172">Ja razumijem zabraniti </text:span><text:span text:style-name="T171">dohvaćati </text:span><text:span text:style-name="T172">JavaScript </text:span><text:span text:style-name="T171">koji nešto naređuje internetskom pregledniku</text:span><text:span text:style-name="T172"> iz nepouzdanih izvora, ali JSON nije skripta </text:span><text:span text:style-name="T171">koja nešto naređuje</text:span><text:span text:style-name="T172">. Ne vidim kako bi netko mogao napraviti cross-site scripting napad izmjenjivajući nečiji JSON, ali vidim kako bi to netko mogao napraviti izmjenjivajući nešto što se postavlja kao </text:span><text:span text:style-name="T173">innerHTML</text:span><text:span text:style-name="T172"> </text:span><text:span text:style-name="T171">(recimo, da u to umetne „</text:span><text:span text:style-name="T174">&lt;img src=</text:span><text:span text:style-name="T175">"X" onerror="alert('x')"&gt;</text:span><text:span text:style-name="T171">”)</text:span><text:span text:style-name="T172">. </text:span><text:span text:style-name="T171">Valjda ta odluka potječe iz vremena kada se JSON parsirao naredbom </text:span><text:span text:style-name="T174">eval</text:span><text:span text:style-name="T171">, </text:span><text:span text:style-name="T176">pa si uistinu mogao napraviti cross-site scripting napad tako da umetneš neispravan JSON (kakav naredba </text:span><text:span text:style-name="T177">JSON.parse</text:span><text:span text:style-name="T176">, koja se danas koristi za parsiranje JSON-a, ne bi prihvatila, </text:span><text:span text:style-name="T178">ali </text:span><text:span text:style-name="T179">eval</text:span><text:span text:style-name="T178"> bi</text:span><text:span text:style-name="T176">). </text:span><text:span text:style-name="T180">Otvorio sam pitanje na forumu o tome</text:span><text:span text:style-name="T180"><text:note text:id="ftn14" text:note-class="footnote"><text:note-citation>14</text:note-citation><text:note-body><text:p text:style-name="P67">https://security.stackexchange.com/q/270915/249645</text:p></text:note-body></text:note></text:span><text:span text:style-name="T180">.</text:span></text:p>
          <text:p text:style-name="P81">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2">Umjetna inteligencija GitHub Copilot upozorila me je da možda kršim autorska prava ovim dijelom datoteke <text:span text:style-name="T39">headerScript.js</text:span> koji služi za prikazivanje heksadekadskog broja na sedam-segmentnom pokazniku, jer se <text:span text:style-name="T181">gotovo identični</text:span> dijelovi programskog koda nalaze u nekim GitHub repozitorijima bez licence ili pod drugim licencama:</text:p>
          <text:p text:style-name="P83">function displayHexadecimalNumber(display, number) {</text:p>
          <text:p text:style-name="P83"><text:s text:c="2"/>if (!(display instanceof SVGElement) ||</text:p>
          <text:p text:style-name="P83"><text:s text:c="6"/>display.classList[0] !== "sevenSegmentDisplay") {</text:p>
          <text:p text:style-name="P83"><text:s text:c="4"/>if (playing)</text:p>
          <text:p text:style-name="P83"><text:s text:c="6"/>clearInterval(simulationThread);</text:p>
          <text:p text:style-name="P83"><text:s text:c="4"/>alert(</text:p>
          <text:p text:style-name="P83"><text:s text:c="8"/>"The simulator crashed! Some part of the simulator attempted to display a hexadecmal number on something that's not an HTML element suited for that.");</text:p>
          <text:p text:style-name="P83"><text:s text:c="4"/>return;</text:p>
          <text:p text:style-name="P83"><text:s text:c="2"/>}</text:p>
          <text:p text:style-name="P83"><text:s text:c="2"/>if (number &lt; 0 || number &gt; 15 || typeof number !== "number") {</text:p>
          <text:p text:style-name="P83"><text:s text:c="4"/>if (playing)</text:p>
          <text:p text:style-name="P83"><text:s text:c="6"/>clearInterval(simulationThread);</text:p>
          <text:p text:style-name="P83"><text:s text:c="4"/>alert(</text:p>
          <text:p text:style-name="P83"><text:s text:c="8"/>'The simulator crashed! Some part of the simulator tried to display "' +</text:p>
          <text:p text:style-name="P83"><text:s text:c="8"/>number + '" as a hexadecimal digit.');</text:p>
          <text:p text:style-name="P83"><text:s text:c="2"/>}</text:p>
          <text:p text:style-name="P83"><text:s text:c="2"/>number = Math.floor(number);</text:p>
          <text:p text:style-name="P83"><text:s text:c="2"/>const LEDs = [</text:p>
          <text:p text:style-name="P83"><text:s text:c="4"/>"1111110", // 0</text:p>
          <text:p text:style-name="P83"><text:s text:c="4"/>"0110000", // 1</text:p>
          <text:p text:style-name="P83"><text:s text:c="4"/>"1101101", // 2</text:p>
          <text:p text:style-name="P83"><text:s text:c="4"/>"1111001", // 3</text:p>
          <text:p text:style-name="P83"><text:s text:c="4"/>"0110011", // 4</text:p>
          <text:p text:style-name="P83"><text:s text:c="4"/>"1011011", // 5</text:p>
          <text:p text:style-name="P83"><text:s text:c="4"/>"1011111", // 6</text:p>
          <text:p text:style-name="P83"><text:s text:c="4"/>"1110000", // 7</text:p>
          <text:p text:style-name="P83"><text:s text:c="4"/>"1111111", // 8</text:p>
          <text:p text:style-name="P83"><text:s text:c="4"/>"1111011", // 9</text:p>
          <text:p text:style-name="P83"><text:s text:c="4"/>"1110111", // A</text:p>
          <text:p text:style-name="P83"><text:soft-page-break/><text:s text:c="4"/>"0011111", // b</text:p>
          <text:p text:style-name="P83"><text:s text:c="4"/>"1001110", // c</text:p>
          <text:p text:style-name="P83"><text:s text:c="4"/>"0111101", // d</text:p>
          <text:p text:style-name="P83"><text:s text:c="4"/>"1001111", // E</text:p>
          <text:p text:style-name="P83"><text:s text:c="4"/>"1000111", // F</text:p>
          <text:p text:style-name="P83"><text:s text:c="2"/>];</text:p>
          <text:p text:style-name="P83"><text:s text:c="2"/>const LED = LEDs[number];</text:p>
          <text:p text:style-name="P83"><text:s text:c="2"/>for (let i = 0; i &lt; display.children.length; i++)</text:p>
          <text:p text:style-name="P83"><text:s text:c="4"/>display.children[i].setAttribute("fill",</text:p>
          <text:p text:style-name="P83"><text:s text:c="37"/>LED[i] === "0" ? "#333333" : "#ffaaaa");</text:p>
          <text:p text:style-name="P83">}</text:p>
          <text:p text:style-name="P82">Mislim da se protiv te optužbe mogu braniti tvrdnjom da su jednostavno mnogi inženjeri računarstva došli na sličnu ideju, jer je to vjerojatno i najočitiji i najefikasniji način da se to napravi. Slični 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4"><text:span text:style-name="T22">Naknadno je dodano da </text:span><text:span text:style-name="T182">taj potprogram</text:span><text:span text:style-name="T22"> pomoću algoritma Levenshtainove distance </text:span><text:span text:style-name="T183">(iz dinamičkog programiranja)</text:span><text:span text:style-name="T22"> </text:span><text:span text:style-name="T182">daje prijedloge za ono što smatra da su pogrešno napisana imena registara (nameregsova), konstanti, ili labela. Zapravo, isprva je, od verzije v5.1.0, to </text:span><text:span text:style-name="T183">taj potprogram radio</text:span><text:span text:style-name="T182"> samo za konstante i labele, a ne i za registre, jer asembler nekada ne može biti siguran da neki token uopće treba biti registar (recimo, drugi operand od naredbe </text:span><text:span text:style-name="T184">load</text:span><text:span text:style-name="T182">).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5">TreeNode.js</text:span><text:span text:style-name="T182"> ima 340 redaka koda. </text:span><text:span text:style-name="T186">Jedno se vrijeme </text:span><text:span text:style-name="T187">TreeNode.js</text:span><text:span text:style-name="T186"> rušio ako se postavi da su drugi i treći operand operatora </text:span><text:span text:style-name="T187">?:</text:span><text:span text:style-name="T186"> labelsi </text:span><text:span text:style-name="T188">(jer je metoda za evaluaciju aritmetičkih izraza imala pristup samo konstantama, ali ne i labelsima)</text:span><text:span text:style-name="T186">,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88">(U ozbiljnijim compilerima takve bi stvari radio zaseban potprogram zvan semantički analizer.)</text:span><text:span text:style-name="T22">. Ima 1'050 redaka koda. </text:span><text:span text:style-name="T189">Za skraćivanje ponavljajućeg koda za semantičke promjene korištene su dvije lambda-funkcije: </text:span><text:span text:style-name="T190">check_if_the_only_argument_is_register</text:span><text:span text:style-name="T189"> i </text:span><text:span text:style-name="T190">check_if_there_are_three_child_nodes_and_the_second_one_is_comma</text:span><text:span text:style-name="T189">. </text:span><text:span text:style-name="T22">Pretvoriti strojni kod u heksad</text:span><text:span text:style-name="T191">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1">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2">Riječ </text:span><text:span text:style-name="T193">assembler</text:span><text:span text:style-name="T192"> znači </text:span><text:span text:style-name="T193">sastavljač</text:span><text:span text:style-name="T192">, dolazi, preko francuskog, od latinskog </text:span><text:span text:style-name="T193">assimulare </text:span><text:span text:style-name="T192">(sastaviti), od </text:span><text:span text:style-name="T193">ad</text:span><text:span text:style-name="T192"> (na) i </text:span><text:span text:style-name="T193">s</text:span><text:span text:style-name="T194">i</text:span><text:span text:style-name="T193">m</text:span><text:span text:style-name="T194">u</text:span><text:span text:style-name="T193">l</text:span><text:span text:style-name="T192"> (</text:span><text:span text:style-name="T195">zajedno</text:span><text:span text:style-name="T192">).</text:span></text:p>
          <text:p text:style-name="P85">U verziji v6.1.0 postojao je bug u assembleru da, ako je string koji je predan naredbi <text:span text:style-name="T39">print_string</text:span> počinj<text:span text:style-name="T196">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6"><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text:span><text:soft-page-break/><text:span text:style-name="T22">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197">nota</text:span><text:span text:style-name="T7"> fama esse loquuntur. </text:span><text:span text:style-name="T22">S kojom je riječi povezana riječ</text:span><text:span text:style-name="T7"> nota </text:span><text:span text:style-name="T22">(poznata)? Ako znate samo 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198">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199">i</text:span><text:span text:style-name="T7">bus) Grcima (Graecis) glasinom poznata.</text:span><text:span text:style-name="T22"> </text:span><text:span text:style-name="T200">Pridjev </text:span><text:span text:style-name="T201">fertilis</text:span><text:span text:style-name="T200"> (</text:span><text:span text:style-name="T201">plodan</text:span><text:span text:style-name="T200">) ima nepravilan superlativ</text:span><text:span text:style-name="T201"> fertilissimus</text:span><text:span text:style-name="T200"> umjesto</text:span><text:span text:style-name="T201"> fertillimus</text:span><text:span text:style-name="T200">, ne znam ima li još takvih pridjeva u latinskom jeziku</text:span><text:span text:style-name="T200"><text:note text:id="ftn15" text:note-class="footnote"><text:note-citation>15</text:note-citation><text:note-body><text:p text:style-name="P87">Otvorio sam pitanje o tome na forumu: <text:span text:style-name="T39">https://latin.stackexchange.com/q/21069/8533</text:span></text:p></text:note-body></text:note></text:span><text:span text:style-name="T200">.</text:span><text:span text:style-name="T201"> </text:span><text:span text:style-name="T202">Imenica </text:span><text:span text:style-name="T203">locus</text:span><text:span text:style-name="T202"> (mjesto) obično je muškog roda i množina joj je</text:span><text:span text:style-name="T203"> loci</text:span><text:span text:style-name="T202">, ali, kad označava neku površinu </text:span><text:span text:style-name="T204">(kao u ovom slučaju)</text:span><text:span text:style-name="T202">, onda je srednjeg roda i množina joj je</text:span><text:span text:style-name="T203"> loca</text:span><text:span text:style-name="T202">.</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5">Dobar su posao napravili oni koji su sastavljali taj test da nađu rečenicu s toliko mnogo nepravilnih riječi, i koju, kako kaže moj profesor, nitko nije točno preveo! </text:span><text:span text:style-name="T206">Mada, kaže mi moj profesor da su mi upravo moji prijevodi s latinskog na hrvatski donijeli pobjedu na županijskom natjecanju.</text:span><text:span text:style-name="T22"> </text:span><text:span text:style-name="T207">Takve rečenice, </text:span><text:span text:style-name="T208">u kojima nije na prvi pogled očito koja je riječ gramatički povezana s kojom drugom riječi,</text:span><text:span text:style-name="T209"> </text:span><text:span text:style-name="T207">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0">da budu djeca jednog</text:span><text:span text:style-name="T22"> čvor</text:span><text:span text:style-name="T210">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1">ea</text:span><text:span text:style-name="T212"> s kratkim </text:span><text:span text:style-name="T211">a</text:span><text:span text:style-name="T212"> je zamjenica </text:span><text:span text:style-name="T211">ona</text:span><text:span text:style-name="T212">, a </text:span><text:span text:style-name="T211">ea</text:span><text:span text:style-name="T212"> s dugim </text:span><text:span text:style-name="T211">a</text:span><text:span text:style-name="T212"> je prilog </text:span><text:span text:style-name="T211">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3">(</text:span><text:span text:style-name="T214">ra</text:span><text:span text:style-name="T215">đa</text:span><text:span text:style-name="T216"> </text:span><text:span text:style-name="T217">bi bilo</text:span><text:span text:style-name="T216"> </text:span><text:span text:style-name="T215">nascit</text:span><text:span text:style-name="T216">, </text:span><text:span text:style-name="T218">a ne </text:span><text:span text:style-name="T219">nascuntur</text:span><text:span text:style-name="T216">)</text:span><text:span text:style-name="T22">.</text:span><text:span text:style-name="T7"> </text:span><text:span text:style-name="T22">Parser za asemblerski jezik bio je mnogo lakši za napisati nego parser za AEC, moj programski jezik. Parser za moj programski jezik</text:span><text:span text:style-name="T220"><text:note text:id="ftn16" text:note-class="footnote"><text:note-citation>16</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8"><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8"><text:span text:style-name="T22">Prolazi kroz niz koji ti je dao tokenizer i za svaku riječ provjeri nalazi li se na popisu mnemonika (tako se tradicionalno zovu glagoli u asemblerskom jeziku</text:span><text:span text:style-name="T220"><text:note text:id="ftn17" text:note-class="footnote"><text:note-citation>17</text:note-citation><text:note-body><text:p text:style-name="Footnote"><text:span text:style-name="T221">Navodno se tako zovu jer ih je lakše zapamtiti </text:span><text:span text:style-name="T222">nego</text:span><text:span text:style-name="T221"> nizove nula </text:span><text:span text:style-name="T222">i</text:span><text:span text:style-name="T221"> jedinica u strojnom jeziku, od starogrčkog </text:span><text:span text:style-name="T223">μνημονικος</text:span><text:span text:style-name="T221"> (</text:span><text:span text:style-name="T223">mnemonikos</text:span><text:span text:style-name="T221">) što znači </text:span><text:span text:style-name="T223">pamćenje</text:span><text:span text:style-name="T224">. Morate se naviknuti da je informatika prepuna besmislenih imena. Uzmite u obzir </text:span><text:span text:style-name="T225">i</text:span><text:span text:style-name="T224"> da je ime </text:span><text:span text:style-name="T223">digitalna elektronika</text:span><text:span text:style-name="T224"> poprilično besmisleno, ono se prevodi kao </text:span><text:span text:style-name="T226">prst-jantar</text:span><text:span text:style-name="T224">. Nekome bi u antici, tko zna latinski </text:span><text:span text:style-name="T225">i</text:span><text:span text:style-name="T224"> grčki, to ime vjerojatno bilo smiješno. </text:span><text:span text:style-name="T227">Imam jednu anegdotu iz svog studentskog života o tome: Došla je knjižničarka na početku odmora u predavaonicu informirati profesora </text:span><text:span text:style-name="T228">Gorana </text:span><text:span text:style-name="T227">Martinovića da će biti nekakav simpozij gdje bi trebali doći profesori koji se bave humanističkim predmetima, a da misli da se to tiče profesora Martinovića jer on predaje kolegij zvan </text:span><text:span text:style-name="T229">Dizajn programske podrške</text:span><text:span text:style-name="T227">. A profesor Martinović joj odgovori: </text:span><text:span text:style-name="T229">Ah, kolegice, pa nije Vam to nikakav dizajn, to se samo tako zove. </text:span><text:span text:style-name="T227">Knjižničarka ga je, naravno, onda začuđeno pogledala. </text:span><text:span text:style-name="T230">Ili, kako je moderator Latin Language StackExchangea zvan </text:span><text:span text:style-name="T231">cmw</text:span><text:span text:style-name="T230"> komentirao na naziv „</text:span><text:span text:style-name="T231">objektivno orijentirano programiranje</text:span><text:span text:style-name="T230">”: „</text:span><text:span text:style-name="T231">Nije ga smišljao neki filolog, to je očito.</text:span><text:span text:style-name="T230">” (</text:span><text:a xlink:type="simple" xlink:href="https://latin.stackexchange.com/questions/20811/how-would-you-say-object-oriented-programming-in-latin#comment42987_20814" text:style-name="Internet_20_link" text:visited-style-name="Visited_20_Internet_20_Link"><text:span text:style-name="T232">https://latin.stackexchange.com/questions/20811/how-would-you-say-object-oriented-programming-in-latin#comment42987_20814</text:span></text:a><text:span text:style-name="T230">). </text:span><text:span text:style-name="T233">Ne slažete se s njime? Probajte nekome tko nije programer objasniti etimologiju tog naziva, mislim da će vam postati jasno o čemu priča.</text:span></text:p></text:note-body></text:note></text:span><text:span text:style-name="T22">) ili pretprocesorskih direktiva. Ti se </text:span><text:soft-page-break/><text:span text:style-name="T22">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4">a većina se lingvista slaže da Daniel Everettov opis pirahanske gramatike proturječi Chomskyjevoj univerzalnoj gramatici i zbog toga misle da je netočan</text:span><text:span text:style-name="T22">) tvrde da je pirahanski jezik, slabo dokumentirani jezik iz Brazila, takav </text:span><text:span text:style-name="T235">(da u njemu ne postoje složene rečenice)</text:span><text:span text:style-name="T22">.</text:span></text:p>
            </text:list-item>
            <text:list-item>
              <text:p text:style-name="P88"><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36">(kao što su ternarni uvjetni operator </text:span><text:span text:style-name="T237">?:</text:span><text:span text:style-name="T236">, operator pridruživanja </text:span><text:span text:style-name="T237">:=</text:span><text:span text:style-name="T236"> i skraćena pridruživanja </text:span><text:span text:style-name="T237">+=</text:span><text:span text:style-name="T236">, </text:span><text:span text:style-name="T237">-=</text:span><text:span text:style-name="T236">, </text:span><text:span text:style-name="T237">*=</text:span><text:span text:style-name="T236"> i </text:span><text:span text:style-name="T237">/=</text:span><text:span text:style-name="T236">)</text:span><text:span text:style-name="T22">. No, budući da su svi aritmetički operatori lijevo-asocijativni, to</text:span><text:span text:style-name="T238"> </text:span><text:span text:style-name="T239">u </text:span><text:span text:style-name="T240">parseru za asemblerski jezik</text:span><text:span text:style-name="T238"> </text:span><text:span text:style-name="T22">nije potrebno.</text:span></text:p>
            </text:list-item>
          </text:list>
        </text:list-item>
      </text:list>
      <text:p text:style-name="P89"><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9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1"><text:span text:style-name="T22">Tri godine kasnije, na početak potprograma </text:span><text:span text:style-name="T125">parser.js</text:span><text:span text:style-name="T22"> dodao sam dio za parsiranje </text:span><text:span text:style-name="T125">if</text:span><text:span text:style-name="T22">-grananja, </text:span><text:span text:style-name="T125">if</text:span><text:span text:style-name="T22">-</text:span><text:span text:style-name="T125">else</text:span><text:span text:style-name="T22">-grananja i </text:span><text:span text:style-name="T125">while</text:span><text:span text:style-name="T22">-petlji, algoritmom u biti identičnim onim što ga koristim u compileru za svoj programski jezik, uz jedinu bitnu razliku da u </text:span><text:span text:style-name="T125">parser.js</text:span><text:span text:style-name="T22"> ne podržavam </text:span><text:span text:style-name="T125">elseif</text:span><text:span text:style-name="T22"> naredbu. </text:span><text:span text:style-name="T241">Zapravo, isprva sam mu zadao da izvrti dvije </text:span><text:span text:style-name="T242">for</text:span><text:span text:style-name="T241">-petlje, jednu koja parsira </text:span><text:span text:style-name="T242">if</text:span><text:span text:style-name="T241">-grananja, a drugu, poslije nje, koja parsira </text:span><text:span text:style-name="T242">while</text:span><text:span text:style-name="T241">-petlje. Također sam mu bio zadao da prije no što parsira </text:span><text:span text:style-name="T242">if</text:span><text:span text:style-name="T241">-grananje ili </text:span><text:span text:style-name="T242">while</text:span><text:span text:style-name="T241">-petlju, provjeri da ga nije roditeljska rekurzija već isparsirala, tako da provjeri da li je polje </text:span><text:span text:style-name="T242">children</text:span><text:span text:style-name="T241"> u čvoru s tekstom „</text:span><text:span text:style-name="T243">while</text:span><text:span text:style-name="T241">” ili „</text:span><text:span text:style-name="T243">if</text:span><text:span text:style-name="T241">” prazno, te da parsira samo ako je prazno. Kasnije sam to izmijenio da se parsiranje i </text:span><text:span text:style-name="T242">if</text:span><text:span text:style-name="T241"> i </text:span><text:span text:style-name="T242">while</text:span><text:span text:style-name="T241"> naredbi vrši u jednoj </text:span><text:span text:style-name="T242">for</text:span><text:span text:style-name="T241">-petlji, te sam izbacio provjere jesu li te naredbe već parsirane (što mislim da se ne može dogoditi ako se sve to radi u jednoj </text:span><text:span text:style-name="T242">for</text:span><text:span text:style-name="T241">-petlji). Time sam malo pojednostavio kod, a funkcionalnost bi trebala ostati ista.</text:span><text:span text:style-name="T22"> Tako da </text:span><text:span text:style-name="T125">parser.js</text:span><text:span text:style-name="T22"> sada ima 2</text:span><text:span text:style-name="T241">47</text:span><text:span text:style-name="T22"> redaka.</text:span></text:p>
      <text:p text:style-name="P92"><text:span text:style-name="T244">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5">Zbog toga me je kritizirao korisnik Reddita </text:span><text:span text:style-name="T246">Fofeu</text:span><text:span text:style-name="T246"><text:note text:id="ftn18" text:note-class="footnote"><text:note-citation>18</text:note-citation><text:note-body><text:p text:style-name="P67">https://www.reddit.com/r/ProgrammingLanguages/comments/iehbmj/comment/g2kevqm/?utm_source=share&amp;utm_medium=web2x&amp;context=3</text:p></text:note-body></text:note></text:span><text:span text:style-name="T245">, koji tvrdi da je doktor informatike koji specijalizira </text:span><text:span text:style-name="T247">teoriju compilera</text:span><text:span text:style-name="T245">. </text:span><text:span text:style-name="T248">On kaže da, osim što frameworksi za pisanje parsera skraćuju kôd parsera 5 ili 10 puta, također odbijaju parsirati </text:span><text:soft-page-break/><text:span text:style-name="T248">nekonzistentne gramatike. </text:span><text:span text:style-name="T249">A, po njemu, trivijalno je nenamjerno smisliti nekonzistentnu gramatiku za programski jezik. </text:span><text:span text:style-name="T250">I kaže da mu se ne da proučiti gramatiku koju sam smislio da vidi je li konzistentna, jer je vjerojatnost da je amater poput mene uspio smisliti konzistentnu gramatiku koja je toliko komplicirana (950 redaka u čistom C++-u) zanemariva.</text:span></text:p>
      <text:p text:style-name="P93"><text:span text:style-name="T250">D</text:span><text:span text:style-name="T22">a sam PicoBlaze asemblerski kôd išao parsirati pomoću alata kao što je BISON (recimo da postoji BISON </text:span><text:span text:style-name="T217">kompatibilan s</text:span><text:span text:style-name="T22"> JavaScript</text:span><text:span text:style-name="T217">om</text:span><text:span text:style-name="T22">), kako bih mu mogao objasniti onaj problem s </text:span><text:span text:style-name="T125">enable</text:span><text:span text:style-name="T22"> i </text:span><text:span text:style-name="T125">disable</text:span><text:span text:style-name="T22">, da su te riječi nekada glagoli, a nekada prilozi, i da ih treba različito parsirati ovisno o tome? Otvorio sam to pitanje na forumu o izradi programskih jezika</text:span><text:span text:style-name="T22"><text:note text:id="ftn19" text:note-class="footnote"><text:note-citation>19</text:note-citation><text:note-body><text:p text:style-name="P67">https://languagedesign.stackexchange.com/q/1679/330</text:p></text:note-body></text:note></text:span><text:span text:style-name="T22">.</text:span></text:p>
      <text:p text:style-name="P94"><text:span text:style-name="T22">Kasnije je u parser za PicoBlaze dodana mogućnost korištenja ternarnog uvjetnog operatora </text:span><text:span text:style-name="T125">?:</text:span><text:span text:style-name="T22">. To sam radio algoritmom </text:span><text:span text:style-name="T7">scanning backwards</text:span><text:span text:style-name="T22">, koji se, kako su mi rekli na Discordu, ne smatra dobrim. Otvoreno je pitanje o tome na forumu o izradi programskih jezika</text:span><text:span text:style-name="T22"><text:note text:id="ftn20" text:note-class="footnote"><text:note-citation>20</text:note-citation><text:note-body><text:p text:style-name="P67">https://langdev.stackexchange.com/q/4071/330</text:p></text:note-body></text:note></text:span><text:span text:style-name="T22">. </text:span><text:span text:style-name="T251">Tako da datoteka </text:span><text:span text:style-name="T252">parser.js</text:span><text:span text:style-name="T251"> sada ima 360 redaka koda.</text:span></text:p>
      <text:p text:style-name="P95">Do verzije v5.4.5 u parseru je postojao bug u implementaciji trećeg koraka algoritma, što se tiče detekcije unarnih operatora. Recimo da netko napiše ovakav neispravan asemblerski program:</text:p>
      <text:p text:style-name="P96">address 0</text:p>
      <text:p text:style-name="P96">inst 5++</text:p>
      <text:p text:style-name="P95">Asembler se rušio ovom porukom o pogrešci:</text:p>
      <text:p text:style-name="P95"><draw:frame draw:style-name="fr4" draw:name="Image18" text:anchor-type="as-char" svg:width="4.6752in" svg:height="1.8083in" draw:z-index="26"><draw:image xlink:href="Pictures/1000000000000231000000D9E17DD36C.png" xlink:type="simple" xlink:show="embed" xlink:actuate="onLoad" draw:mime-type="image/png"/></draw:frame></text:p>
      <text:p text:style-name="P97">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3">Svejedno, to je ispravljeno u verziji v5.4.6. </text:span><text:span text:style-name="T254">Do verzije v5.4.7 for-petlja za detektiranje unarnih operatora išla je prema naprijed, i zato se parser rušio kad treba parsirati, recimo, </text:span><text:span text:style-name="T255">inst - -5</text:span><text:span text:style-name="T254">, ali od verzije v5.4.7 ta je greška ispravljena tako što petlja za detekciju unarnih operatora ide prema nazad. Sada se </text:span><text:span text:style-name="T255">inst - -5 </text:span><text:span text:style-name="T254">parsira isto kao </text:span><text:span text:style-name="T255">inst 5</text:span><text:span text:style-name="T254">.</text:span></text:p>
      <text:p text:style-name="P98"><text:span text:style-name="T256">Od verzije v6.3.5 parser je refaktoriran da koristi manje while-petlji, a više funkcijskog programiranja. Naime, da se koriste funkcije </text:span><text:span text:style-name="Source_20_Text"><text:span text:style-name="T257">findIndex</text:span></text:span><text:span text:style-name="T258"> , </text:span><text:span text:style-name="Source_20_Text"><text:span text:style-name="T257">findLastIndex</text:span></text:span><text:span text:style-name="T258"> </text:span><text:span text:style-name="T259">i </text:span><text:span text:style-name="Source_20_Text"><text:span text:style-name="T257">slice</text:span></text:span><text:span text:style-name="T258"> </text:span><text:span text:style-name="T259">kada parser treba,</text:span><text:span text:style-name="T260"> recimo, </text:span><text:span text:style-name="T259">skočiti s mnemonike na znak za novi red i iskopirati pokazivače na tokene između njih u novi niz (da ga preda rekurziji)</text:span><text:span text:style-name="T258">. </text:span><text:span text:style-name="T259">Naredba </text:span><text:span text:style-name="T261">findLastIndex</text:span><text:span text:style-name="T259"> koristi se za parsiranje desno-asocijativnog ternarnog uvjetnog operatora. Naletio sam na problem da Firefox 52 ne podržava </text:span><text:span text:style-name="T261">findLastIndex</text:span><text:span text:style-name="T259">, ali to je lagano riješiti ovako:</text:span></text:p>
      <text:p text:style-name="P99"><text:s text:c="2"/>if (!Array.prototype</text:p>
      <text:p text:style-name="P99"><text:s text:c="11"/>.findLastIndex) // Firefox 52 (the last version of Firefox to run on</text:p>
      <text:p text:style-name="P99"><text:s text:c="27"/>// Windows XP) does not support the findLastIndex</text:p>
      <text:p text:style-name="P99"><text:s text:c="27"/>// directive on an array.</text:p>
      <text:p text:style-name="P99"><text:s text:c="4"/>Array.prototype.findLastIndex = function(lambda) {</text:p>
      <text:p text:style-name="P99"><text:s text:c="6"/>for (let i = this.length - 1; i &gt;= 0; i--)</text:p>
      <text:p text:style-name="P99"><text:s text:c="8"/>if (lambda(this[i], i))</text:p>
      <text:p text:style-name="P99"><text:s text:c="10"/>return i;</text:p>
      <text:p text:style-name="P99"><text:s text:c="6"/>return -1;</text:p>
      <text:p text:style-name="P99"><text:s text:c="4"/>};</text:p>
      <text:p text:style-name="P100"><text:soft-page-break/>Sada se ternarni uvjetni operator parsira ovako:</text:p>
      <text:p text:style-name="P101"><text:s text:c="2"/>let lastColon;</text:p>
      <text:p text:style-name="P101"><text:s text:c="2"/>while ((lastColon = tokenized.findLastIndex((node, index) =&gt; {</text:p>
      <text:p text:style-name="P101"><text:s text:c="11"/>if (index &gt; tokenized.length - 2)</text:p>
      <text:p text:style-name="P101"><text:s text:c="13"/>return false;</text:p>
      <text:p text:style-name="P101"><text:s text:c="11"/>if (node.text == ':' &amp;&amp; tokenized[index + 1].text != '\n')</text:p>
      <text:p text:style-name="P101"><text:s text:c="13"/>return true;</text:p>
      <text:p text:style-name="P101"><text:s text:c="11"/>return false;</text:p>
      <text:p text:style-name="P101"><text:s text:c="9"/>})) != -1) {</text:p>
      <text:p text:style-name="P101"><text:s text:c="4"/>console.log(</text:p>
      <text:p text:style-name="P101"><text:s text:c="8"/>"DEBUG: Parsing the ternary conditional operator. The colon is at the index: " +</text:p>
      <text:p text:style-name="P101"><text:s text:c="8"/>lastColon);</text:p>
      <text:p text:style-name="P101"><text:s text:c="4"/>let counter = 1;</text:p>
      <text:p text:style-name="P101"><text:s text:c="4"/>const questionMarkCorrespondingToTheLastColon =</text:p>
      <text:p text:style-name="P101"><text:s text:c="8"/>tokenized.findLastIndex((node, index) =&gt; {</text:p>
      <text:p text:style-name="P101"><text:s text:c="10"/>if (index &gt;= lastColon)</text:p>
      <text:p text:style-name="P101"><text:s text:c="12"/>return false;</text:p>
      <text:p text:style-name="P101"><text:s text:c="10"/>if (node.text == '?')</text:p>
      <text:p text:style-name="P101"><text:s text:c="12"/>counter--;</text:p>
      <text:p text:style-name="P101"><text:s text:c="10"/>else if (node.text == ':')</text:p>
      <text:p text:style-name="P101"><text:s text:c="12"/>counter++;</text:p>
      <text:p text:style-name="P101"><text:s text:c="10"/>return counter == 0;</text:p>
      <text:p text:style-name="P101"><text:s text:c="8"/>});</text:p>
      <text:p text:style-name="P101"><text:s text:c="4"/>if (questionMarkCorrespondingToTheLastColon == -1) {</text:p>
      <text:p text:style-name="P101"><text:s text:c="6"/>alert("Line #" + tokenized[lastColon].lineNumber +</text:p>
      <text:p text:style-name="P101"><text:s text:c="12"/>": There is a colon without a matching question mark before it!");</text:p>
      <text:p text:style-name="P101"><text:s text:c="6"/>return root_of_abstract_syntax_tree;</text:p>
      <text:p text:style-name="P101"><text:s text:c="4"/>}</text:p>
      <text:p text:style-name="P101"><text:s text:c="4"/>console.log("DEBUG: The corresponding question mark is at the index: " +</text:p>
      <text:p text:style-name="P101"><text:s text:c="16"/>questionMarkCorrespondingToTheLastColon);</text:p>
      <text:p text:style-name="P101"><text:s text:c="4"/>if (questionMarkCorrespondingToTheLastColon == 0) {</text:p>
      <text:p text:style-name="P101"><text:s text:c="6"/>alert(</text:p>
      <text:p text:style-name="P101"><text:s text:c="10"/>"Line #" +</text:p>
      <text:p text:style-name="P101"><text:s text:c="10"/>tokenized[questionMarkCorrespondingToTheLastColon].lineNumber +</text:p>
      <text:p text:style-name="P101"><text:s text:c="10"/>": The ternary conditional operator has no first argument (the condition).");</text:p>
      <text:p text:style-name="P101"><text:s text:c="6"/>return root_of_abstract_syntax_tree;</text:p>
      <text:p text:style-name="P101"><text:s text:c="4"/>}</text:p>
      <text:p text:style-name="P101"><text:s text:c="4"/>let nodesThatRecursionDealsWith =</text:p>
      <text:p text:style-name="P101"><text:s text:c="8"/>tokenized.slice(questionMarkCorrespondingToTheLastColon + 1, lastColon);</text:p>
      <text:p text:style-name="P101"><text:s text:c="4"/>tokenized[questionMarkCorrespondingToTheLastColon].text = "?:";</text:p>
      <text:p text:style-name="P101"><text:s text:c="4"/>tokenized[questionMarkCorrespondingToTheLastColon].children.push(</text:p>
      <text:p text:style-name="P101"><text:s text:c="8"/>tokenized[questionMarkCorrespondingToTheLastColon - 1]);</text:p>
      <text:p text:style-name="P101"><text:s text:c="4"/>const whatTheRecursionReturned = parse(nodesThatRecursionDealsWith);</text:p>
      <text:p text:style-name="P101"><text:s text:c="4"/>if (whatTheRecursionReturned.children.length &gt; 1) {</text:p>
      <text:p text:style-name="P101"><text:s text:c="6"/>alert("Line #" + whatTheRecursionReturned.children[1].lineNumber +</text:p>
      <text:p text:style-name="P101"><text:s text:c="12"/>": Unexpected token `" + whatTheRecursionReturned.children[1].text +</text:p>
      <text:p text:style-name="P101"><text:s text:c="12"/>"`!");</text:p>
      <text:p text:style-name="P101"><text:soft-page-break/><text:s text:c="6"/>return root_of_abstract_syntax_tree;</text:p>
      <text:p text:style-name="P101"><text:s text:c="4"/>}</text:p>
      <text:p text:style-name="P101"><text:s text:c="4"/>tokenized[questionMarkCorrespondingToTheLastColon].children.push(</text:p>
      <text:p text:style-name="P101"><text:s text:c="8"/>whatTheRecursionReturned.children[0]);</text:p>
      <text:p text:style-name="P101"><text:s text:c="4"/>tokenized[questionMarkCorrespondingToTheLastColon].children.push(</text:p>
      <text:p text:style-name="P101"><text:s text:c="8"/>tokenized[lastColon + 1]);</text:p>
      <text:p text:style-name="P101"><text:s text:c="4"/>console.log(</text:p>
      <text:p text:style-name="P101"><text:s text:c="8"/>"DEBUG: The ternary conditional operator converted to LISP is: " +</text:p>
      <text:p text:style-name="P101"><text:s text:c="8"/>tokenized[questionMarkCorrespondingToTheLastColon].getLispExpression());</text:p>
      <text:p text:style-name="P101"><text:s text:c="4"/>tokenized.splice(questionMarkCorrespondingToTheLastColon + 1,</text:p>
      <text:p text:style-name="P101"><text:s text:c="21"/>lastColon - questionMarkCorrespondingToTheLastColon + 1);</text:p>
      <text:p text:style-name="P101"><text:s text:c="4"/>tokenized.splice(questionMarkCorrespondingToTheLastColon - 1, 1);</text:p>
      <text:p text:style-name="P101"><text:s text:c="2"/>}</text:p>
      <text:p text:style-name="P102">Na prvi pogled bi se <text:span text:style-name="T2">činilo da je to znatno sporije nego da smo više puta vrtili while-petlju unutar while-petlje, ali mjerenja to ne potvrđuju.</text:span></text:p>
      <text:list text:continue-numbering="true" text:style-name="WWNum1">
        <text:list-item>
          <text:p text:style-name="P103"><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1">Dodatkom pretprocesorske naredbe </text:span><text:span text:style-name="T252">print_string</text:span><text:span text:style-name="T251"> to se ponašanje moralo modificirati. Kad pretprocesor dođe do naredbe </text:span><text:span text:style-name="T252">print_string</text:span><text:span text:style-name="T251">, on poveća trenutnu adresu za duljinu prvog djeteta (stringa) minus dva puta dva. To je zato što se naredba print_string implementira tako da se ovakav kod:</text:span></text:p>
          <text:p text:style-name="P104"><text:span text:style-name="T262">print_string </text:span><text:span text:style-name="T263">“Hi!”, s9, UART_TX</text:span></text:p>
          <text:p text:style-name="P105">Zamijenjuje ovakvim kodom:</text:p>
          <text:p text:style-name="P106">load s9, “H”</text:p>
          <text:p text:style-name="P106">call UART_TX</text:p>
          <text:p text:style-name="P106">load s9, “I”</text:p>
          <text:p text:style-name="P106">call UART_TX</text:p>
          <text:p text:style-name="P106">load s9, “!”</text:p>
          <text:p text:style-name="P106">call UART_TX</text:p>
          <text:p text:style-name="P107"><text:span text:style-name="T238">Dakle, za svaki znak u stringu, osim za po</text:span><text:span text:style-name="T22">četne i završne navodnike, rade se dvije strojnokodske naredbe. </text:span><text:span text:style-name="T189">Od verzije v6.1.0, pretprocesor također prolazi kroz string i smanjuje adresu za dva za svaku pojavu podstringa „</text:span><text:span text:style-name="T190">\n</text:span><text:span text:style-name="T189">” u stringu, jer to predstavlja znak za novi red (jedan znak).</text:span></text:p>
          <text:p text:style-name="P103"><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8"><text:span text:style-name="T264">Tri godine kasnije, dodao sam FlatAssemblerovu naredbu </text:span><text:span text:style-name="T265">display</text:span><text:span text:style-name="T264"> u pretprocesor svog asemblera za PicoBlaze. </text:span><text:span text:style-name="T266">Ta naredba za vrijeme asembliranja ispisuje stringove ili konstante na terminal, da </text:span><text:soft-page-break/><text:span text:style-name="T266">možemo provjeriti jesu li konstante dobro izračunate. Također sam dodao </text:span><text:span text:style-name="T267">if</text:span><text:span text:style-name="T266">-grananja, </text:span><text:span text:style-name="T267">if</text:span><text:span text:style-name="T266">-</text:span><text:span text:style-name="T267">else</text:span><text:span text:style-name="T266">-grananja i </text:span><text:span text:style-name="T267">while</text:span><text:span text:style-name="T266">-petlje, slične kao što postoje u FlatAssembleru. Glavna razlika između tih stvari u FlatAssembleru i u mom asembleru za PicoBlaze je u što se </text:span><text:span text:style-name="T268">u</text:span><text:span text:style-name="T266"> </text:span><text:span text:style-name="T267">if</text:span><text:span text:style-name="T266">-grananjima i </text:span><text:span text:style-name="T267">while</text:span><text:span text:style-name="T266">-petljama u mom PicoBlaze asembleru </text:span><text:span text:style-name="T268">ne mogu nalaziti mnemonik</text:span><text:span text:style-name="T269">e</text:span><text:span text:style-name="T268"> ili naredba </text:span><text:span text:style-name="T270">address</text:span><text:span text:style-name="T268">, jer ne znam kako bih, da to dopustim, izračunavao adrese labela. </text:span><text:span text:style-name="T269">U FlatAssembleru, recimo, mogu postojati programi kao što je ovaj </text:span><text:span text:style-name="T271">(</text:span><text:span text:style-name="T269">ne pazim na sintaksu, ali nadam se da će uspjeti shvatiti o čemu se radi):</text:span></text:p>
          <text:p text:style-name="P109">address 0</text:p>
          <text:p text:style-name="P109">firstLabel:</text:p>
          <text:p text:style-name="P110">if firstLabel=secondLabel</text:p>
          <text:p text:style-name="P111"><text:span text:style-name="T272"><text:s text:c="4"/>load </text:span><text:span text:style-name="T262">s0,s0</text:span></text:p>
          <text:p text:style-name="P109">endif</text:p>
          <text:p text:style-name="P109">secondLabel:</text:p>
          <text:p text:style-name="P112"><text:span text:style-name="T273">Na tako nešto, FlatAssembler upada u beskonačnu petlju, jer čim izračunaš adresu labelu </text:span><text:span text:style-name="T274">secondLabel</text:span><text:span text:style-name="T273">, ona se promijeni. Odlučio sam taj problem riješiti tako da se u </text:span><text:span text:style-name="T274">if</text:span><text:span text:style-name="T273">-grananjima i </text:span><text:span text:style-name="T274">while</text:span><text:span text:style-name="T273">-petljama mogu nalaziti samo pretprocesorske naredbe, </text:span><text:span text:style-name="T275">a ne i mnemonike</text:span><text:span text:style-name="T273">. Istina je da se neke funkcije </text:span><text:span text:style-name="T274">if</text:span><text:span text:style-name="T273">-grananja i </text:span><text:span text:style-name="T274">while</text:span><text:span text:style-name="T273">-petlja time gube, ali neke ostaju, a lagano je za implementirati. FlatAssemblerove makro-naredbe bile bi još korisnije nego </text:span><text:span text:style-name="T274">if</text:span><text:span text:style-name="T273">-grananja i </text:span><text:span text:style-name="T274">while</text:span><text:span text:style-name="T273">-petlje, ali nemam pojma kako ih implementirati.</text:span></text:p>
          <text:p text:style-name="P113"><text:span text:style-name="T273">Nedugo nakon što sam implementirao </text:span><text:span text:style-name="T274">display</text:span><text:span text:style-name="T273"> i </text:span><text:span text:style-name="T274">if</text:span><text:span text:style-name="T273"> i </text:span><text:span text:style-name="T274">while</text:span><text:span text:style-name="T273">, uočio sam jedan veoma neobičan bug u pretprocesoru. Naime, pretprocesorska naredba „</text:span><text:span text:style-name="T274">display a</text:span><text:span text:style-name="T273">” </text:span><text:span text:style-name="T276">(za prelazak u novi red, jer je ASCII kod znaka za novi red 10, a 10 je u heksadekadskom </text:span><text:span text:style-name="T277">a</text:span><text:span text:style-name="T276">) ne funkcionira ako je u vrijeme asembliranja UART isključen. </text:span><text:span text:style-name="T278">Nisam uspio točnije dijagnosticirati problem, i nemam pojma kako pretprocesor uopće može znati je li UART uključen ili isključen. Otvorio sam GitHub issue o tom problemu</text:span><text:span text:style-name="T278"><text:note text:id="ftn21" text:note-class="footnote"><text:note-citation>21</text:note-citation><text:note-body><text:p text:style-name="P67">https://github.com/FlatAssembler/PicoBlaze_Simulator_in_JS/issues/8</text:p></text:note-body></text:note></text:span><text:span text:style-name="T278">.</text:span></text:p>
          <text:p text:style-name="P114"><text:span text:style-name="T278">P</text:span><text:span text:style-name="T273">retprocesor, prije nego što krene procesirati program, definira dvije konstante: </text:span><text:span text:style-name="T274">PicoBlaze_Simulator_in_JS</text:span><text:span text:style-name="T273"> i </text:span><text:span text:style-name="T274">PicoBlaze_Simulator_for_Android</text:span><text:span text:style-name="T273">. Ukoliko pretprocesor misli da je pokrenut u internetskom pregledniku, </text:span><text:span text:style-name="T274">PicoBlaze_Simulator_in_JS</text:span><text:span text:style-name="T273"> postavlja u 1, a </text:span><text:span text:style-name="T274">PicoBlaze_Simulator_for_Android</text:span><text:span text:style-name="T273"> u 0. Ukoliko pretprocesor detektira da je pokrenut u mom programu </text:span><text:span text:style-name="T274">PicoBlaze_Simulator_for_Android</text:span><text:span text:style-name="T273"> (više o njemu na kraju ovog teksta), tako što je deklariran globalni objekt </text:span><text:span text:style-name="T274">PicoBlaze</text:span><text:span text:style-name="T273">, koji u </text:span><text:span text:style-name="T274">PicoBlaze_Simulator_for_Android</text:span><text:span text:style-name="T273"> služi kao sučelje pomoću kojeg komuniciraju potprogrami pisani u JavaScriptu s potprogramima pisanima u Javi (potprogrami pisani u Javi vide ga pod nazivom </text:span><text:span text:style-name="T274">WebAppInterface</text:span><text:span text:style-name="T273">), to je </text:span><text:span text:style-name="T279">vice versa</text:span><text:span text:style-name="T273">. Gotovo svi asembleri danas imaju pretprocesorske naredbe koje omogućuju asembliranom programu da detektira kojom se verzijom asemblera asemblira, uglavnom i naprednije nego ove što sam ugradio u svoj simulator PicoBlazea. </text:span><text:span text:style-name="T280">Tu mogućnost </text:span><text:span text:style-name="T281">assembler sniffinga</text:span><text:span text:style-name="T280"> objavio sam u verziji v2.8.3, i to je posljednje što sam napravio sâm. Nedugo nakon što sam objavio verziju v2.8.3, pridružio mi se </text:span><text:span text:style-name="T281">agustiza</text:span><text:span text:style-name="T280"> sa sveučilišta u Argentini.</text:span></text:p>
          <text:p text:style-name="P115"><text:span text:style-name="T282">K</text:span><text:span text:style-name="T251">asnije sam dodao u pretprocesor naredbe </text:span><text:span text:style-name="T252">base_decimal</text:span><text:span text:style-name="T251"> i </text:span><text:span text:style-name="T252">base_hexadecimal</text:span><text:span text:style-name="T251">. Naime, radi kompatibilnosti sa Xilinxovim asemblerom, numerički literali bez specificirane brojevne baze po defaultu se interpretiraju kao heksadekadske, što, po mom iskustvu, često dovodi do grešaka u programima. I zato sam </text:span><text:span text:style-name="T283">u verziji v5.0.0</text:span><text:span text:style-name="T251"> dodao naredbe kojima se to može mijenjati. Zbog načina na koji je asembler napravljen, ako se te naredbe stave u if-grananje ili while-petlju, može se dogoditi da pretprocesor </text:span><text:span text:style-name="T284">(koji interpretira naredbu </text:span><text:span text:style-name="T285">constant</text:span><text:span text:style-name="T284">)</text:span><text:span text:style-name="T251"> interpretira konstante kao dekadske, a asembler </text:span><text:span text:style-name="T284">(koji interpretira naredbu </text:span><text:span text:style-name="T285">inst</text:span><text:span text:style-name="T284">)</text:span><text:span text:style-name="T251"> kao heksadekadske. </text:span><text:span text:style-name="T283">Recimo, ovaj program:<text:line-break/></text:span><text:span text:style-name="Source_20_Text"><text:span text:style-name="T286">address 0</text:span></text:span></text:p>
        </text:list-item>
      </text:list>
      <text:p text:style-name="P116"><text:span text:style-name="Source_20_Text"><text:span text:style-name="T257"><text:tab/>if 2+2=4</text:span></text:span></text:p>
      <text:p text:style-name="P116"><text:span text:style-name="Source_20_Text"><text:span text:style-name="T257"><text:s text:c="4"/><text:tab/><text:tab/>base_decimal</text:span></text:span></text:p>
      <text:p text:style-name="P116"><text:span text:style-name="Source_20_Text"><text:span text:style-name="T257"><text:tab/>endif</text:span></text:span></text:p>
      <text:p text:style-name="P116"><text:span text:style-name="Source_20_Text"><text:span text:style-name="T257"><text:tab/>constant ten, 10</text:span></text:span></text:p>
      <text:p text:style-name="P116"><text:span text:style-name="Source_20_Text"><text:span text:style-name="T257"><text:tab/>inst ten</text:span></text:span></text:p>
      <text:p text:style-name="P117"><text:span text:style-name="Source_20_Text"><text:span text:style-name="T257"><text:tab/>inst 10</text:span></text:span></text:p>
      <text:p text:style-name="P117"><text:span text:style-name="Source_20_Text"><text:span text:style-name="T287"><text:tab/></text:span></text:span><text:span text:style-name="Source_20_Text"><text:span text:style-name="T283">Asemblira se u ovakav strojni kod:</text:span></text:span><text:span text:style-name="Source_20_Text"><text:span text:style-name="T287"><text:line-break/><text:tab/>0000a</text:span></text:span></text:p>
      <text:p text:style-name="P118"><text:span text:style-name="Source_20_Text"><text:span text:style-name="T39"><text:tab/>00010</text:span></text:span></text:p>
      <text:p text:style-name="P118"><text:soft-page-break/><text:span text:style-name="Source_20_Text"><text:span text:style-name="T287"><text:tab/></text:span></text:span><text:span text:style-name="Source_20_Text"><text:span text:style-name="T283">A ne u ono što korisnik vjerojatno očekuje:</text:span></text:span><text:span text:style-name="Source_20_Text"><text:span text:style-name="T287"><text:line-break/><text:tab/>0000a</text:span></text:span></text:p>
      <text:p text:style-name="P119"><text:span text:style-name="Source_20_Text"><text:span text:style-name="T257"><text:tab/>0000a</text:span></text:span><text:span text:style-name="Source_20_Text"><text:span text:style-name="T287"><text:line-break/><text:tab/></text:span></text:span><text:span text:style-name="T251">Nema očitog rješenja za taj problem. </text:span><text:span text:style-name="T283">Otvoreno je pitanje o tome na forumu o izradi programskih <text:tab/>jezika</text:span><text:span text:style-name="T283"><text:note text:id="ftn22" text:note-class="footnote"><text:note-citation>22</text:note-citation><text:note-body><text:p text:style-name="P67">https://langdev.stackexchange.com/q/4303/330</text:p></text:note-body></text:note></text:span><text:span text:style-name="T283">.</text:span></text:p>
      <text:list text:continue-numbering="true" text:style-name="WWNum1">
        <text:list-header>
          <text:p text:style-name="P120"><text:span text:style-name="T22">Compiler za moj programski jezik nema pretprocesor. Jedino u njemu što bi donekle podsjećalo na pretprocesor je to što driver, ako su prve dvije riječi u nizu koji vrati tokenizer „</text:span><text:span text:style-name="T125">#target WASI</text:span><text:span text:style-name="T22">” ili „</text:span><text:span text:style-name="T125">#targe</text:span><text:span text:style-name="T288">t</text:span><text:span text:style-name="T125"> browser</text:span><text:span text:style-name="T22">”, postavlja da globalna varijabla </text:span><text:span text:style-name="T125">compilation_target</text:span><text:span text:style-name="T22"> bude jednaka toj drugoj riječi, i onda izbriše te prve dvije riječi iz niza (prije nego što ga preda parseru). </text:span><text:span text:style-name="T289">Budući da tokenizer briše komentare, prije rečenice „</text:span><text:span text:style-name="T288">#target WASI</text:span><text:span text:style-name="T289">” ili „</text:span><text:span text:style-name="T288">#target browser</text:span><text:span text:style-name="T289">” mogu postojati komentari, ali ne mogu postojati nikakve deklaracije. Naime, postoje dvije veoma različite okoline u kojima se WebAssembly (koji ispisuje moj compiler) može pokretati, to su internetski preglednik (</text:span><text:span text:style-name="T290">browser</text:span><text:span text:style-name="T289">) i WASI (</text:span><text:span text:style-name="T290">WebAssembly System Interface</text:span><text:span text:style-name="T289">, </text:span><text:span text:style-name="T291">što je pokušaj da se napravi standard pomoću kojeg je moguće izrađivati command-line programe koji će se vrtjeti na više operacijskih sustava </text:span><text:span text:style-name="T292">koristeći WebAssembly</text:span><text:span text:style-name="T289">). Oni, između ostalog, zahtijevaju da se globalne varijable deklariraju na različit način. A svi programi koje ispisuje moj compiler koriste globalnu varijablu zvanu </text:span><text:span text:style-name="T288">$stack_pointer</text:span><text:span text:style-name="T289">. To je, dakle, bio </text:span><text:span text:style-name="T290">quick-and-dirty fix</text:span><text:span text:style-name="T289">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3">(to je moguće tako što globalni objekt </text:span><text:span text:style-name="T294">machineCode</text:span><text:span text:style-name="T293">, osim heksadekadskih stringova koji predstavljaju naredbe u strojnom kodu, sadrži i redni broj linije asemblerskog koda odakle naredbe dolaze, pa potprogram </text:span><text:span text:style-name="T294">simulator.js</text:span><text:span text:style-name="T293"> može provjeriti nalazi li se redni broj linije asemblerskog koda odakle dolazi trenutna naredba strojnog koda u globalnom nizu </text:span><text:span text:style-name="T294">breakpoints</text:span><text:span text:style-name="T293">)</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21"><text:span text:style-name="T22">Pri pisanju </text:span><text:span text:style-name="T125">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5">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25">simulator.js</text:span><text:span text:style-name="T22"> uprogramirati da za svaki </text:span><text:span text:style-name="T7">regbank</text:span><text:span text:style-name="T22"> postoje zasebne zastavice </text:span><text:span text:style-name="T295">(kao na Z80)</text:span><text:span text:style-name="T22">, </text:span><text:span text:style-name="T296">a ispod tablice sa zastavicima napisati napomenu „</text:span><text:span text:style-name="T297">I have good reasons to think the emulation of flags is unrealistic, especially when it comes to REGBANKs.</text:span><text:span text:style-name="T296">”</text:span><text:span text:style-name="T22">. </text:span><text:span text:style-name="T298">Također sam naletio na problem da sam i u </text:span><text:span text:style-name="T299">assembler.js</text:span><text:span text:style-name="T298"> i </text:span><text:span text:style-name="T300">u</text:span><text:span text:style-name="T298"> </text:span><text:span text:style-name="T299">simulator.js</text:span><text:span text:style-name="T298"> </text:span><text:span text:style-name="T301">bio </text:span><text:span text:style-name="T298">uprogramirao krivi </text:span><text:span text:style-name="T302">opcode</text:span><text:span text:style-name="T298"> </text:span><text:span text:style-name="T303">(</text:span><text:span text:style-name="T301">O</text:span><text:span text:style-name="T303">no što se u asemblerskom jeziku zove mnemonika, u strojnom jeziku zove se </text:span><text:span text:style-name="T304">opcode</text:span><text:span text:style-name="T303">. </text:span><text:span text:style-name="T301">Riječ </text:span><text:span text:style-name="T304">opcode</text:span><text:span text:style-name="T301"> dolazi od </text:span><text:span text:style-name="T305">op</text:span><text:span text:style-name="T304">eration </text:span><text:span text:style-name="T305">code</text:span><text:span text:style-name="T301">.</text:span><text:span text:style-name="T303">)</text:span><text:span text:style-name="T298"> za mnemoniku </text:span><text:span text:style-name="T299">star</text:span><text:span text:style-name="T298"> (</text:span><text:span text:style-name="T306">st</text:span><text:span text:style-name="T302">ore </text:span><text:span text:style-name="T306">ar</text:span><text:span text:style-name="T302">gument</text:span><text:span text:style-name="T298">, stavi podatak u registar u drugoj </text:span><text:span text:style-name="T302">regbanki</text:span><text:span text:style-name="T298">, </text:span><text:span text:style-name="T307">naime, zamišljeno je da glavni program koristi jednu regbanku, a funkcije koriste drugu regbanku, i da se argumenti koje šaljemo funkcijama spremaju u drugu regbanku</text:span><text:span text:style-name="T298">), </text:span><text:span text:style-name="T308">ali to sam brzo dijagnosticirao i ispravio kad </text:span><text:soft-page-break/><text:span text:style-name="T308">sam primjer </text:span><text:span text:style-name="T309">Binary to Decimal</text:span><text:span text:style-name="T308"> pokrenuo na pravom PicoBlazeu </text:span><text:span text:style-name="T310">(usporedio sam heksadekadsku datoteku koju ispisuje moj asembler i heksadekadsku datoteku koju ispisuje Xilinxov asembler)</text:span><text:span text:style-name="T308">.</text:span></text:p>
          <text:p text:style-name="P122"><text:span text:style-name="T308">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25">sra</text:span><text:span text:style-name="T22">, te mi je 21. kolovoza 2023. napravio </text:span><text:span text:style-name="T7">pull request</text:span><text:span text:style-name="T22"> s ispravkom tog buga</text:span><text:span text:style-name="T22"><text:note text:id="ftn23" text:note-class="footnote"><text:note-citation>23</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11">(i izvorno japanskih riječi i ranih posuđenica iz kineskog)</text:span><text:span text:style-name="T22">. </text:span><text:span text:style-name="T7">Katakana</text:span><text:span text:style-name="T22"> je slogovno pismo koje se </text:span><text:span text:style-name="T311">na japanskom jeziku</text:span><text:span text:style-name="T22"> koristi za pisanje korijena stranih riječi ili onomatopeja. </text:span><text:span text:style-name="T311">Drugim riječima, čim naučite katakanu, možete, čim vidite neki tekst na japanskom jeziku, prepoznati koje su riječi posuđenice i po njima odrediti o čemu je tekst. To nije slučaj na, recimo, korejskom jeziku</text:span><text:span text:style-name="T22">. </text:span><text:span text:style-name="T312">U Južnoj Koreji se i gramatički afiksi i strane riječi pišu hangulom, a u Sjevernoj Koreji se čak i korijeni riječi pišu hangulom (jer je u Sjevernoj Koreji </text:span><text:span text:style-name="T313">u sklopu lingvističkog purizma</text:span><text:span text:style-name="T312"> zabranjeno korejski jezik pisati kineskim znakovima). Makar hangul bio lakši za naučiti ljudima naviknutim na alfabete nego što je katakana, da bismo </text:span><text:span text:style-name="T314">u tekstu</text:span><text:span text:style-name="T312"> na korejskom jeziku prepoznali posuđenice, moramo dekodirati čitav tekst, a ne samo posebno označene riječi </text:span><text:span text:style-name="T315">(kao što su na japanskom jeziku posuđenice posebno označene tako što su pisane katakanom)</text:span><text:span text:style-name="T312">.</text:span><text:span text:style-name="T22"> </text:span><text:span text:style-name="T7">Hiragana</text:span><text:span text:style-name="T22"> je slogovno pismo koji se koristi za pisanje gramatičkih afiksa (prefiksa i sufiksa) </text:span><text:span text:style-name="T311">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6">Tokenizer, osim toga, briše komentare.</text:span><text:span text:style-name="T22"> Potprogram </text:span><text:span text:style-name="T38">tokenizer.js</text:span><text:span text:style-name="T22"> ima 95 linija. Tokenizer za moj programski jezik</text:span><text:span text:style-name="T220"><text:note text:id="ftn24" text:note-class="footnote"><text:note-citation>24</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23"><text:span text:style-name="T22">Kada sam pisao primjer PicoBlaze asemblerskog programa zvan „</text:span><text:span text:style-name="T7">Regbanks-Flags Test</text:span><text:span text:style-name="T22">”, naletio sam na idući problem. Programi kao što je ovaj:</text:span></text:p>
          <text:p text:style-name="P124">address 0</text:p>
          <text:p text:style-name="P124">load s9, " "</text:p>
          <text:p text:style-name="P125"><text:span text:style-name="T317">Prva naredba znači „</text:span><text:span text:style-name="T318">Počni pisati strojni kod od adrese 0.</text:span><text:span text:style-name="T317">” (i svaki PicoBlaze asemblerski program mora počinjati takvom naredbom), a druga naredba znaći „</text:span><text:span text:style-name="T318">U registar </text:span><text:span text:style-name="T319">s9</text:span><text:span text:style-name="T318"> učitaj ASCII vrijednost razmaka.</text:span><text:span text:style-name="T317">”. Kad sam svom PicoBlaze simulatoru zadao da to asemblira, dobio sam ovakvu poruku o pogrešci: „</text:span><text:span text:style-name="Emphasis"><text:span text:style-name="T320">Line </text:span></text:span><text:span text:style-name="Emphasis"><text:span text:style-name="T321">#2</text:span></text:span><text:span text:style-name="Emphasis"><text:span text:style-name="T320">: The AST node "load" should have exactly three child nodes (a comma is also a child node).</text:span></text:span><text:span text:style-name="T317">”. To sam na brzinu riješio tako što sam umjesto druge naredbe napisao:</text:span></text:p>
          <text:p text:style-name="P124">load s9, 20 ;Space</text:p>
          <text:p text:style-name="P126">Naime, 20 je heksadekadski ASCII kod od razmaka. Pretpostav<text:span text:style-name="T322">io sam odmah</text:span> da se programi kao što je onaj koji sam napisao gore ne daju asemblirati zbog nekog buga u tokenizeru, ali nisam točnije dijagnosticirao problem. <text:span text:style-name="T322">Tek sam sutradan uspio točnije dijagnosticirati i riješiti problem. Trebalo mi je malo vremena da se prisjetim kako program koji sam napisao tri godine ranije funkcionira.</text:span></text:p>
          <text:p text:style-name="P127">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ext:soft-page-break/>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7">https://langdev.stackexchange.com/q/4068/330</text:p></text:note-body></text:note>.</text:p>
        </text:list-item>
        <text:list-item>
          <text:p text:style-name="P128">db.php <text:span text:style-name="T221">– to je back-end koji se vrti na serveru i koji gleda je li pozvan HTTP metodom POST ili GET. Ako je pozvan metodom GET, dohvaća program poslan argumentom </text:span><text:span text:style-name="T223">id</text:span><text:span text:style-name="T221"> iz baze podataka koja se vrti na SourceForgeovim MySQL serverima i šalje ga front-endu. Ako je pozvan metodom POST, stavlja program koji mu je poslan argumentom </text:span><text:span text:style-name="T223">code</text:span><text:span text:style-name="T221"> u bazu podataka. Prvu je verziju napisao Abidin Durdu, back-end developer iz Turske. </text:span><text:span text:style-name="T323">Čim smo ga probali zavrtjeti na SourceForgeu, pojavio se problem da je Abidin Durdu zamislio da se lozinka čita iz </text:span><text:span text:style-name="T324">.env</text:span><text:span text:style-name="T323"> datoteke naredbom </text:span><text:span text:style-name="T324">getenv</text:span><text:span text:style-name="T323">, ali to na SourceForgeu nije funkcioniralo. Zato smo odlučili da </text:span><text:span text:style-name="T324">.env</text:span><text:span text:style-name="T323"> datoteka sadrži samo string „</text:span><text:span text:style-name="T324">password=</text:span><text:span text:style-name="T325">lozinka</text:span><text:span text:style-name="T324">\r\n</text:span><text:span text:style-name="T323">”, te da se čita s </text:span><text:span text:style-name="T324">file_get_contents</text:span><text:span text:style-name="T323">.</text:span><text:span text:style-name="T221"> </text:span><text:span text:style-name="T326">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7">http_response_code(404);</text:span><text:span text:style-name="T326">. </text:span><text:span text:style-name="T323">Nepotrebno za reći, dato</text:span><text:span text:style-name="T328">t</text:span><text:span text:style-name="T323">eke </text:span><text:span text:style-name="T324">db.php</text:span><text:span text:style-name="T323"> nema na GitHub Pagesu, nego samo na SourceForgeu. </text:span><text:span text:style-name="T329">U verziji v5.9.2 napisana je i PHP skripta za brisanje programa iz baze podataka (koja zahtijeva lozinku da bi se pokrenula) zvana </text:span><text:span text:style-name="T330">deleteTheProgram.php</text:span><text:span text:style-name="T329"> i PHP kod koji je zajednički tim dvama skriptama (za čitanje lozinki iz </text:span><text:span text:style-name="T330">.env</text:span><text:span text:style-name="T329"> datoteke i slično) izdvojen je iz njih i stavljen u datoteku </text:span><text:span text:style-name="T330">db_helper.php</text:span><text:span text:style-name="T329">.</text:span></text:p>
        </text:list-item>
        <text:list-item>
          <text:p text:style-name="P129">viewer.js<text:span text:style-name="T221"> – to je JavaScript datoteka koja gleda u URL kojim je stranica pozvana pomoću naredbe </text:span>const urlParams = new URLSearchParams(window.location.search);<text:span text:style-name="T221">, te, ukoliko URL sadrži parametar </text:span><text:span text:style-name="T223">id</text:span><text:span text:style-name="T221">, naredbom </text:span><text:span text:style-name="T223">fetch</text:span><text:span text:style-name="T221"> dohvaća s back-enda asemblerski program s navedenim </text:span><text:span text:style-name="T223">id</text:span><text:span text:style-name="T221">-jem iz baze podataka. </text:span><text:span text:style-name="T331">Prvu verziju ovog potprograma napisao je Abidin Durdu. </text:span><text:span text:style-name="T332">Učitava se s HTML atributom </text:span><text:span text:style-name="T333">defer</text:span><text:span text:style-name="T332">. </text:span><text:span text:style-name="T323">Naravno, datoteke </text:span><text:span text:style-name="T324">viewer.js</text:span><text:span text:style-name="T323"> nema na GitHub Pagesu, nego samo na SourceForgeu.</text:span></text:p>
        </text:list-item>
        <text:list-item>
          <text:p text:style-name="P130">sharer.js<text:span text:style-name="T221"> – to je JavaScript datoteka koja se isto učitava s </text:span><text:span text:style-name="T223">defer</text:span><text:span text:style-name="T221">, i isto ju je napisao Abidin Durdu, i ona se poziva kada se klikne gumb </text:span><text:span text:style-name="T223">Upload</text:span><text:span text:style-name="T221"> na sredini između </text:span><text:span text:style-name="T223">Higlight Assembly</text:span><text:span text:style-name="T221"> i </text:span><text:span text:style-name="T223">Assemble</text:span><text:span text:style-name="T221">. On šalje naredbom </text:span><text:span text:style-name="T223">fetch</text:span><text:span text:style-name="T221"> asemblerski program na back-end da ga pohrani u bazu podataka.</text:span></text:p>
          <text:p text:style-name="P130"><text:span text:style-name="T221">Naletjeli smo na dva problema. Prvi je bio taj što je Abidin Durdu pokušao URL uploadanog programa prikazati korisniku pomoću JavaScriptine naredbe </text:span><text:span text:style-name="T223">prompt</text:span><text:span text:style-name="T221">, ali to je pravilo probleme u nekim preglednicima (najviše WebPositiveu). Zato sam ja napravio da se oni prikazuju preko ovakvog dijaloškog okvira:</text:span></text:p>
          <text:p text:style-name="P131"><draw:frame text:anchor-type="as-char" draw:z-index="18" draw:name="Image with transparency 1" draw:style-name="gr1" draw:text-style-name="P132" svg:width="5.3232in" svg:height="1.0441in"><draw:image xlink:href="Pictures/10000001000003C2000000B4A865FF44.png" xlink:type="simple" xlink:show="embed" xlink:actuate="onLoad" draw:mime-type="image/png"><text:p/></draw:image></draw:frame></text:p>
          <text:p text:style-name="P130"><text:span text:style-name="T221">Dolje lijevo je gumb za kopiranje tog URL-a koji, na žalost, ne funkcionira u Firefoxu 52, i nema očitog načina da ga se natjera da profunkcionira tamo. </text:span><text:span text:style-name="T334">U tom pregledniku korisnici o tome budu obaviješteni alertom.</text:span></text:p>
          <text:p text:style-name="P130"><text:span text:style-name="T221">A drugi problem je bio taj što JavaScript kao da ne reagira kad server vrati grešku 500, kao da se ponaša kao da je server vratio poruku o uspjehu 200. </text:span><text:span text:style-name="T335">Otvorio sam GitHub issue o tome</text:span><text:span text:style-name="T335"><text:note text:id="ftn26" text:note-class="footnote"><text:note-citation>26</text:note-citation><text:note-body><text:p text:style-name="P67">https://github.com/FlatAssembler/PicoBlaze_Simulator_in_JS/issues/36</text:p></text:note-body></text:note></text:span><text:span text:style-name="T335">.</text:span><text:span text:style-name="T221"> Nisam uspio točnije dijagnosticirati problem, ali uspio sam naći privremeno rješenje: jednostavno provjeri počinje li serverov odgovor sa stringom </text:span><text:span text:style-name="T336">?</text:span>id=<text:span text:style-name="T221">. Poruke o pogrešci ne počinju tako, ali tako počinje ispravan odgovor servera.</text:span></text:p>
          <text:p text:style-name="P133">Datoteke <text:span text:style-name="T39">sharer.js</text:span>, naravno, kao ni datoteke <text:span text:style-name="T39">viewer.js</text:span>, nema na GitHub Pagesu, nego samo na SourceForgeu.</text:p>
        </text:list-item>
        <text:list-item>
          <text:p text:style-name="P134"><text:span text:style-name="T39">deleteTheProgram.php</text:span> – To je PHP skripta koja, ukoliko znamo lozinku koju sam postavio (spremljena u obliku md5 hasha), omogućuje nam da obrišemo neki program iz baze podataka. Isprva je ona samo brisala program iz baze podataka, a sada (od verzije v6.2.1) ona također i u drugu tablicu u bazi podataka zapisuje id-jeve nedavno obrisanih programa kako bi na njihove slotove u <text:soft-page-break/>prvoj tablici došli novi programi. Kao rezultat front-endu vraća popis id-jeva nedavno obrisanih (nezamijenjenih) programa.</text:p>
        </text:list-item>
        <text:list-item>
          <text:p text:style-name="P134"><text:span text:style-name="T39">controlPannel.php</text:span> – To je PHP skripta dodana u v6.3.0 koja omogućuje meni da lako obrišem više programa iz baze podataka odjednom. Također mi omogućuje da obrišem program, a da njegov id ne bude zapisan u drugu tablicu. <text:span text:style-name="T337">Ovako to izgleda:</text:span></text:p>
          <text:p text:style-name="P134"><draw:frame draw:style-name="fr1" draw:name="Image23" text:anchor-type="as-char" svg:width="6.0846in" svg:height="3.2319in" draw:z-index="27"><draw:image xlink:href="Pictures/1000000100000780000003FC68545773.png" xlink:type="simple" xlink:show="embed" xlink:actuate="onLoad" draw:mime-type="image/png"/></draw:frame></text:p>
          <text:p text:style-name="P135">Za sintaksno highlightiranje koristi JavaScript pohranjen u <text:span text:style-name="T39">headerScript.js</text:span> i <text:span text:style-name="T39">list_of_directives.js</text:span> o kojoj te funkcije ovise. Brojevi redova ne rade se pomoću apsolutnog pozicioniranja u JavaScriptu, kao u PicoBlaze.html, nego kombinacijom apsolutnog i relativnog pozicioniranja u CSS-u. Div s linijama koda i pre s asemblerskim kodom smješteni su u jedan nevidljivi div koji je pozicioniran relativno, a div s linijama koda ima top 0 i pozicioniran je apsolutno, i pre s asemblerskim kodom isto je pozicioniran apsolutno i ima top -1em. To je tehnika CSS programiranja koju sam naučio na tečaju front-end developmenta na Algebri.</text:p>
        </text:list-item>
        <text:list-item>
          <text:p text:style-name="P136"><text:span text:style-name="T39">logout.php</text:span> – tipičan logout u PHP-u koji poništava sesiju i redirektira.</text:p>
        </text:list-item>
        <text:list-item>
          <text:p text:style-name="P136"><text:span text:style-name="T39">login.php</text:span> – login forma u PHP-u, bez JavaScripta. Koristi veoma moderan CSS kombinirajući flexbox i grid. Ne prikazuje se posve ispravno u Firefoxu 52 (posljednjoj verziji Firefoxa koja se vrti na Windows XP-u) jer Firefox 52 ignorira naredbu <text:span text:style-name="T39">gap</text:span> na CSS gridu. Ovako izgleda u modernim internetskim preglednicima:</text:p>
          <text:p text:style-name="P136"><draw:frame draw:style-name="fr1" draw:name="Image24" text:anchor-type="as-char" svg:width="3.8083in" svg:height="1.85in" draw:z-index="28"><draw:image xlink:href="Pictures/10000001000001C9000000DE38145D1D.png" xlink:type="simple" xlink:show="embed" xlink:actuate="onLoad" draw:mime-type="image/png"/></draw:frame></text:p>
          <text:p text:style-name="P136">A ovako izgleda u Firefoxu 52, elementi su zbijeni jedan na drugi:</text:p>
          <text:p text:style-name="P136"><draw:frame draw:style-name="fr1" draw:name="Image25" text:anchor-type="as-char" svg:width="3.75in" svg:height="1.65in" draw:z-index="29"><draw:image xlink:href="Pictures/10000001000001C2000000C6BF964996.png" xlink:type="simple" xlink:show="embed" xlink:actuate="onLoad" draw:mime-type="image/png"/></draw:frame></text:p>
        </text:list-item>
      </text:list>
      <text:p text:style-name="P137"><text:soft-page-break/><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38"><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7" text:note-class="footnote"><text:note-citation>27</text:note-citation><text:note-body><text:p text:style-name="P67">https://github.com/FlatAssembler/PicoBlaze_Simulator_in_JS/pull/11</text:p></text:note-body></text:note></text:span><text:span text:style-name="T22">, koji sam ja prihvatio. </text:span><text:span text:style-name="T338">Taj </text:span><text:span text:style-name="T339">agustiza</text:span><text:span text:style-name="T338"> mi je napisao</text:span><text:span text:style-name="T22"> da misli da bi automatske testove bilo mnogo lakše raditi da su moji potprogrami JavaScriptski moduli, a ne da se uključuju sa </text:span><text:span text:style-name="T125">&lt;script src="..."&gt;</text:span><text:span text:style-name="T22">, a ja sam mu napisao da bih onda slomio kompatibilnost s Firefoxom 52 (jer je prva verzija Firefoxa koja podržava module Firefox 60), a da mi je važno da moj simulator PicoBlazea funkcionira u njemu. </text:span><text:span text:style-name="T340">Agustiza</text:span><text:span text:style-name="T341"> je zadao BabelJS-u da prepiše (</text:span><text:span text:style-name="T340">rewrite</text:span><text:span text:style-name="T341">) moje JavaScriptske potprograme u module u kojima je svaka funkcija </text:span><text:span text:style-name="T340">export</text:span><text:span text:style-name="T341">ana (nisam do tada znao ni da je to moguće) </text:span><text:span text:style-name="T342">prije nego što ih uključi naredbom </text:span><text:span text:style-name="T343">require</text:span><text:span text:style-name="T342"> u NodeJS programe za testiranje</text:span><text:span text:style-name="T341">.</text:span><text:span text:style-name="T22"> </text:span><text:span text:style-name="T344">Kasnije smo dodali automatsko testiranje parsera, evaluacije aritmetičkih izraza od strane potprograma </text:span><text:span text:style-name="T345">TreeNode.js</text:span><text:span text:style-name="T344">, te malo automatskog testiranja </text:span><text:span text:style-name="T345">simulator.js</text:span><text:span text:style-name="T344">-a. </text:span><text:span text:style-name="T186">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6">(u NodeJS-u, kad nema problema s layout trashingom, inače se u browseru vrti nekoliko sati zbog layout trashinga)</text:span><text:span text:style-name="T186">.</text:span><text:span text:style-name="T344"> Međutim, </text:span><text:span text:style-name="T347">test coverage</text:span><text:span text:style-name="T344"> još je uvijek </text:span><text:span text:style-name="T186">relativno</text:span><text:span text:style-name="T344"> nizak, i, ako ćete doprinositi ovom projektu, nemojte se oslanjati isključivo na te automatske testove, već radite i ručno testiranje.</text:span></text:p>
      <text:p text:style-name="P139"><text:span text:style-name="T22">U compileru za moj programski jezik još postoji, kao i u compilerima za većinu programskih jezika, semantički analizer</text:span><text:span text:style-name="T22"><text:note text:id="ftn28" text:note-class="footnote"><text:note-citation>28</text:note-citation><text:note-body><text:p text:style-name="P67">https://github.com/FlatAssembler/AECforWebAssembly/raw/master/semanticAnalyzer.cpp</text:p></text:note-body></text:note></text:span><text:span text:style-name="T22">. </text:span><text:span text:style-name="T34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9">More people have been to Russia than I have.</text:span><text:span text:style-name="T348">”, „</text:span><text:span text:style-name="T349">Više je ljudi bilo u Rusiji nego što sam ja bio.</text:span><text:span text:style-name="T34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9">Bezbojne zelene ideje spavaju bijesno.</text:span><text:span text:style-name="T34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9">Omne homo habens asinum videt illum.</text:span><text:span text:style-name="T348">”, nju je teško gramatički analizirati, ali, po njemu, svatko tko govori latinski složit će se da je to gramatički ispravna rečenica i da znači „</text:span><text:span text:style-name="T349">Ne posjeduješ magarca ako ga ne vidiš.</text:span><text:span text:style-name="T348">”. Govornici engleskog jezika ne slažu se što znači „</text:span><text:span text:style-name="T349">More people have been to Russia than I have.</text:span><text:span text:style-name="T348">”, ustvari, velika većina ljudi, kada razmisli, slaže se da ona ne znači ništa. </text:span><text:span text:style-name="T350">Ne znam</text:span><text:span text:style-name="T351"> mogu li r</text:span><text:span text:style-name="T352">ečenice kao što </text:span><text:span text:style-name="T353">je</text:span><text:span text:style-name="T352"> „</text:span><text:span text:style-name="T354">Omne homo habens asinum videt illum.</text:span><text:span text:style-name="T352">” postojati u programskim jezicima</text:span><text:span text:style-name="T352"><text:note text:id="ftn29" text:note-class="footnote"><text:note-citation>29</text:note-citation><text:note-body><text:p text:style-name="P140">Korisnik StackExchangea <text:span text:style-name="T47">kaya3</text:span><text:span text:style-name="T355"> misli da se re</text:span><text:span text:style-name="T356">čenice kao što je „</text:span><text:span text:style-name="T357">Omne homo habens asinum videt illum.</text:span><text:span text:style-name="T356">” mogu napraviti u Rustu i u drugim programskim jezicima koji podržavaju </text:span><text:span text:style-name="T357">pattern-matching</text:span><text:span text:style-name="T356">: </text:span><text:span text:style-name="T358">https://languagedesign.stackexchange.com/a/1463/330</text:span></text:p></text:note-body></text:note></text:span><text:span text:style-name="T352">, ali rečenice kao što su „</text:span><text:span text:style-name="T354">More people have been to Russia than I have.</text:span><text:span text:style-name="T352">” </text:span><text:span text:style-name="T351">sigurno</text:span><text:span text:style-name="T352"> mogu.</text:span><text:span text:style-name="T348"> </text:span><text:span text:style-name="T352">Ipak, m</text:span><text:span text:style-name="T359">islim da semantički analizer nije potreban za asemblerski jezik, jer mislim da je </text:span><text:span text:style-name="T360">na</text:span><text:span text:style-name="T359"> asemblerskom jeziku nemoguće konstruirati rečenicu </text:span><text:span text:style-name="T361">kao što je</text:span><text:span text:style-name="T359"> „</text:span><text:span text:style-name="T362">More people have been to Russia than I have.</text:span><text:span text:style-name="T359">”, </text:span><text:span text:style-name="T352">iako su takve rečenice moguće u višim programskim jezicima</text:span><text:span text:style-name="T359">.</text:span></text:p>
      <text:p text:style-name="P141"><text:span text:style-name="T359">A</text:span><text:span text:style-name="T350">ko radite neki viši programski jezik (a ne asembler), nikad ne možete biti sigurni da će se vaš compiler ponašati smisleno u svim mogućim situacijama. </text:span><text:span text:style-name="T363">Dati ću vam ideju o tome jednom nedavnom anegdotom iz svog života. P</text:span><text:span text:style-name="T350">itao sam na internetskom forumu na koje sve probleme možeš naletjeti kad implementiraš ternarni uvjetni operator </text:span><text:span text:style-name="T364">?:</text:span><text:span text:style-name="T364"><text:note text:id="ftn30" text:note-class="footnote"><text:note-citation>30</text:note-citation><text:note-body><text:p text:style-name="P67">https://languagedesign.stackexchange.com/q/1469/330</text:p></text:note-body></text:note></text:span><text:span text:style-name="T350">. Meni se čini da mnogi programski jezici s tim operatorom imaju problema. Recimo, PHP ga neispravno parsira, on ga parsira kao lijevo-asocijativni operator, a treba ga se parsirati kao </text:span><text:soft-page-break/><text:span text:style-name="T350">desno-asocijativni operator (što onemogućuje da se pomoću operatora </text:span><text:span text:style-name="T364">?:</text:span><text:span text:style-name="T350"> u PHP-u skraćeno pišu </text:span><text:span text:style-name="T365">else-if</text:span><text:span text:style-name="T350"> izrazi)</text:span><text:span text:style-name="T350"><text:note text:id="ftn31" text:note-class="footnote"><text:note-citation>31</text:note-citation><text:note-body><text:p text:style-name="P67">https://wiki.php.net/rfc/ternary_associativity</text:p></text:note-body></text:note></text:span><text:span text:style-name="T350">. Moj compiler koji prevodi moj programski jezik na x86 asembler</text:span><text:span text:style-name="T366">ski jezik</text:span><text:span text:style-name="T350"> (koji sam napisao u 4. razredu gimnazije, nije pretjerano kvalitetan projekt, </text:span><text:span text:style-name="T366">pisan je u JavaScriptu i može se pokrenuti u internetskom pregledniku</text:span><text:span text:style-name="T366"><text:note text:id="ftn32" text:note-class="footnote"><text:note-citation>32</text:note-citation><text:note-body><text:p text:style-name="P67">https://flatassembler.github.io/compiler.html</text:p></text:note-body></text:note></text:span><text:span text:style-name="T350">) krivo prevodi taj operator na asembler</text:span><text:span text:style-name="T366">ski jezik</text:span><text:span text:style-name="T350">. </text:span><text:span text:style-name="T367">Naime, on prevodi drugi i treći operand prije nego što prev</text:span><text:span text:style-name="T368">e</text:span><text:span text:style-name="T367">d</text:span><text:span text:style-name="T368">e</text:span><text:span text:style-name="T367"> prvi operand, a to, kako me je upozorio </text:span><text:span text:style-name="T369">rici</text:span><text:span text:style-name="T369"><text:note text:id="ftn33" text:note-class="footnote"><text:note-citation>33</text:note-citation><text:note-body><text:p text:style-name="P67">https://stackoverflow.com/a/62104607/8902065</text:p></text:note-body></text:note></text:span><text:span text:style-name="T367">, može dovesti do greške kao što je dijeljenje s nulom. Naime, netko bi se mogao pokušati zaštititi od dijeljenja s nulom tako što napiše „</text:span><text:span text:style-name="Source_20_Text"><text:span text:style-name="T370">d = 0 ? 0 : n / d</text:span></text:span><text:span text:style-name="T367">” (ako je varijabla </text:span><text:span text:style-name="T370">d</text:span><text:span text:style-name="T367"> jednaka nuli; </text:span><text:span text:style-name="T370">=</text:span><text:span text:style-name="T367"> u mom programskom jeziku znači jednakost, a ne pridruživanje kao </text:span><text:span text:style-name="T366">što znači</text:span><text:span text:style-name="T367"> u C-u), a to neće funkcionirati u dijalektu mog programskog jezika koji se prevodi na x86 </text:span><text:span text:style-name="T371">jer</text:span><text:span text:style-name="T367"> se „</text:span><text:span text:style-name="T370">n / d</text:span><text:span text:style-name="T367">” </text:span><text:span text:style-name="T366">(treći operand)</text:span><text:span text:style-name="T367"> izračunava prije nego </text:span><text:span text:style-name="T372">što se izračunava</text:span><text:span text:style-name="T367"> „</text:span><text:span text:style-name="T370">d = 0</text:span><text:span text:style-name="T367">” </text:span><text:span text:style-name="T366">(prvi operand)</text:span><text:span text:style-name="T367">. </text:span><text:span text:style-name="T366">Pa mi je </text:span><text:span text:style-name="T373">kaya3</text:span><text:span text:style-name="T366"> odgovorio da je jedna od stvari na koju moramo paziti kad implementiramo </text:span><text:span text:style-name="T374">?:</text:span><text:span text:style-name="T366"> da se naš compiler ponaša smisleno ako netko zabunom pokuša kao drugi i treći operand staviti strukture različitog tipa </text:span><text:span text:style-name="T375">(Za moj programski jezik, smisleno bi bilo da semantički analizer to ne propusti do jezgre compilera.)</text:span><text:span text:style-name="T366">. Hm, ne sjećam se da sam na to mislio kad sam pisao svoj compiler koji prevodi moj programski jezik na WebAssembly </text:span><text:span text:style-name="T376">(Za onaj moj compiler koji ga prevodi na x86 to nije bitno, jer on ne podržava strukture.)</text:span><text:span text:style-name="T366">. Idem isprobati kako će moj compiler reagirati na to</text:span><text:span text:style-name="T366"><text:note text:id="ftn34" text:note-class="footnote"><text:note-citation>34</text:note-citation><text:note-body><text:p text:style-name="P142">Program kojim sam to isprobao dostupan je na mom GitHub profilu: <text:span text:style-name="T39">https://github.com/FlatAssembler/AECforWebAssembly/issues/19#issue-1751055396</text:span></text:p></text:note-body></text:note></text:span><text:span text:style-name="T366">. </text:span><text:span text:style-name="T377">On je ispisivao ovakvu poruku o pogrešci:</text:span></text:p>
      <text:p text:style-name="P143"><text:span text:style-name="Source_20_Text"><text:span text:style-name="T378">Line 10, Column 29, Internal compiler error: Some part of the compiler attempted to compile an array with size less than 1, which doesn't make sense. Throwing an exception!</text:span></text:span></text:p>
      <text:p text:style-name="P144"><text:span text:style-name="Source_20_Text"><text:span text:style-name="T377">A u programu koji sam mu zadao da compilira nigdje nema </text:span></text:span><text:span text:style-name="Source_20_Text"><text:span text:style-name="T379">arraysova</text:span></text:span><text:span text:style-name="Source_20_Text"><text:span text:style-name="T377">. Stvarno apsurdna poruka o pogrešci, zar ne? </text:span></text:span><text:span text:style-name="Source_20_Text"><text:span text:style-name="T380">Spadal</text:span></text:span><text:span text:style-name="Source_20_Text"><text:span text:style-name="T368">a</text:span></text:span><text:span text:style-name="Source_20_Text"><text:span text:style-name="T380"> bi u kategoriju </text:span></text:span><text:span text:style-name="Source_20_Text"><text:span text:style-name="T381">not even wrong</text:span></text:span><text:span text:style-name="Source_20_Text"><text:span text:style-name="T380">, ne možeš smisliti kako bi neka greška u compileru dovela do te poruke. Trebalo mi je nekoliko sati da shvatim što se </text:span></text:span><text:span text:style-name="Source_20_Text"><text:span text:style-name="T382">zapravo</text:span></text:span><text:span text:style-name="Source_20_Text"><text:span text:style-name="T380"> u mom compileru događa. Što i nije iznenađujuće s obzirom na to da sam taj compiler pisao tri godine ranije, kad sam bio druga godina. </text:span></text:span><text:span text:style-name="Source_20_Text"><text:span text:style-name="T383">Vjerojatno bi mi trebalo </text:span></text:span><text:span text:style-name="Source_20_Text"><text:span text:style-name="T384">manje vremena </text:span></text:span><text:span text:style-name="Source_20_Text"><text:span text:style-name="T385">(a ne nekoliko sati)</text:span></text:span><text:span text:style-name="Source_20_Text"><text:span text:style-name="T384"> </text:span></text:span><text:span text:style-name="Source_20_Text"><text:span text:style-name="T386">da otkrijem što se u mom compileru događa</text:span></text:span><text:span text:style-name="Source_20_Text"><text:span text:style-name="T383"> da znam koristiti debugger. U biti, taj kôd kojim sam testirao kako će moj compiler reagirati na to da netko stavi strukture različitog tipa kao drugi i treći operand operatora </text:span></text:span><text:span text:style-name="Source_20_Text"><text:span text:style-name="T387">?:</text:span></text:span><text:span text:style-name="Source_20_Text"><text:span text:style-name="T383"> </text:span></text:span><text:span text:style-name="Source_20_Text"><text:span text:style-name="T388">triggerao</text:span></text:span><text:span text:style-name="Source_20_Text"><text:span text:style-name="T383"> je dva buga u mom compileru, jedan u semantičkom analizeru, a jedan u jezgri compilera. </text:span></text:span><text:span text:style-name="Source_20_Text"><text:span text:style-name="T389">Onaj u jezgri compilera </text:span></text:span><text:span text:style-name="Source_20_Text"><text:span text:style-name="T390">triggerao</text:span></text:span><text:span text:style-name="Source_20_Text"><text:span text:style-name="T389"> </text:span></text:span><text:span text:style-name="Source_20_Text"><text:span text:style-name="T391">se </text:span></text:span><text:span text:style-name="Source_20_Text"><text:span text:style-name="T389">samo ako su strukture prazne. </text:span></text:span><text:span text:style-name="Source_20_Text"><text:span text:style-name="T375">I tko zna koliko takvih situacija, u kojima se moj compiler neće ponašati smisleno, još ima, kojih nisam svjestan. </text:span></text:span><text:span text:style-name="Source_20_Text"><text:span text:style-name="T392">Pa, ipak, viši programski jezici razlog su zašto računala mogu sve ono što mogu danas. Da postoje samo strojni jezici i asemblerski jezici, internet gotovo sigurno ne bi postojao.</text:span></text:span></text:p>
      <text:p text:style-name="P145">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93">O tome ovisi kako ćemo parsirati tu rečenicu.</text:span>). Za takve programske jezike compileri između tokenizera i parsera imaju leksički analizer, koji parseru naznačuje koja je riječ koje vrste. Takve su rečenice moguće u C-u i C++-u, i to je poznato kao <text:span text:style-name="T47">typedef problem</text:span>. O<text:span text:style-name="T394">n je pojava da, </text:span><text:span text:style-name="T395">izvan konteksta</text:span><text:span text:style-name="T394">, </text:span><text:span text:style-name="T396">prvi*drugi;</text:span><text:span text:style-name="T394"> (točka-zarez je dio izraza) može značiti i „</text:span><text:span text:style-name="T397">Deklariraj pokazivač koji se zove 'drugi' koji će pokazivati na instancu klase ili strukture koja se zove 'prvi'.</text:span><text:span text:style-name="T394">”, ali može značiti i „</text:span><text:span text:style-name="T397">Uzmi vrijednosti varijabli koje se zovu 'prvi' i 'drugi', pomnoži ih, stavi rezultat na sistemski stog i onda ga zanemari.</text:span><text:span text:style-name="T394">”. Drugo značenje je, naravno, besmisleno (zanemarimo li da se operator množenja </text:span><text:span text:style-name="T398">*</text:span><text:span text:style-name="T394"> u C++-u može preopteretiti u nešto sa side-effectsima), ali je gramatički moguće. </text:span><text:span text:style-name="T399">Rečenice tipa „</text:span><text:span text:style-name="T400">Time flies like an arrow.</text:span><text:span text:style-name="T399">” nisu moguće niti na </text:span><text:span text:style-name="T401">PicoBlazeovom</text:span><text:span text:style-name="T399"> asemblerskom jeziku </text:span><text:span text:style-name="T401">(osim </text:span><text:span text:style-name="T402">što one</text:span><text:span text:style-name="T401"> riječi </text:span><text:span text:style-name="T403">enable</text:span><text:span text:style-name="T401"> i </text:span><text:span text:style-name="T403">disable</text:span><text:span text:style-name="T401"> mogu biti i glagoli i prilozi, ali to se trivijalno riješi u parseru)</text:span><text:span text:style-name="T399"> niti u mom programskom jeziku </text:span><text:span text:style-name="T395">(barem se nadam da je tako)</text:span><text:span text:style-name="T399">, zato ni u PicoBlaze Simulator ni u compiler za svoj programski jezik nisam ugradio leksički analizer.</text:span></text:p>
      <text:p text:style-name="P146">Ukratko, evo kako bi izgledao sekvencijalni dijagram koji objašnjava kako se programi asembliraju u ovom programu:</text:p>
      <text:p text:style-name="P146"><text:soft-page-break/><draw:frame draw:style-name="fr7" draw:name="Image21" text:anchor-type="as-char" svg:width="6.6929in" svg:height="3.7646in" draw:z-index="30"><draw:image xlink:href="Pictures/1000000000000480000002881A73AFC7.jpg" xlink:type="simple" xlink:show="embed" xlink:actuate="onLoad" draw:mime-type="image/jpeg"/></draw:frame></text:p>
      <text:p text:style-name="P147"/>
      <text:p text:style-name="P148">Primjeri programa za PicoBlaze</text:p>
      <text:p text:style-name="P149"><text:span text:style-name="T22">Web-aplikacija nudi </text:span><text:span text:style-name="T404">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49"/>
      <text:p text:style-name="P149"><draw:frame draw:style-name="fr2" draw:name="Frame2" text:anchor-type="char" svg:width="1.2535in" draw:z-index="6"><draw:text-box fo:min-height="1.9445in"><text:p text:style-name="P15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49"><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6">Ako se pokrene u simulatoru, vrti se u beskonačnoj petlji.</text:span><text:span text:style-name="T22"> Ima 83 reda.</text:span></text:p>
      <text:p text:style-name="P151"><draw:frame draw:style-name="fr2" draw:name="Frame1" text:anchor-type="char" svg:width="2.5854in" draw:z-index="4"><draw:text-box fo:min-height="2.1146in"><text:p text:style-name="P15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7">Slika</text:span> <text:sequence text:ref-name="refText0" text:name="Text" text:formula="ooow:Text+1" style:num-format="1">1</text:sequence>: Program "Assembler Test" besmislen je program koji se dobije uz moj simulator PicoBlazea, <text:span text:style-name="T408">njemu</text:span> je <text:span text:style-name="T408">jedini</text:span> cilj ispoljiti greške u asembleru ukoliko one postoje.</text:p></draw:text-box></draw:frame><text:soft-page-break/></text:p>
      <text:p text:style-name="P153"><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9">Binary to Decimal</text:span><text:span text:style-name="T410"> ima 54 retka. Isprobao sam ga na pravom PicoBlazeu i radio je. On koristi regbankse i zastavice, ali ne oslanja se na neku pretpostavku o tome kako se zastavice ponašaju kad se promijeni regbank, tako da to nije dokaz da </text:span><text:span text:style-name="T411">je</text:span><text:span text:style-name="T410"> emulacija zastavica </text:span><text:span text:style-name="T411">u mom simulatoru</text:span><text:span text:style-name="T410"> realistična </text:span><text:span text:style-name="T411">što se tiče</text:span><text:span text:style-name="T410"> regbank</text:span><text:span text:style-name="T411">sa</text:span><text:span text:style-name="T410">. </text:span><text:span text:style-name="T412">2025. godine napisao sam i program u 64-bitnom x86 inline assembleru koji radi to isto, i on se zove </text:span><text:span text:style-name="T413">bin2dec.cpp</text:span><text:span text:style-name="T412">.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53"><draw:frame draw:style-name="fr2" draw:name="Frame4" text:anchor-type="char" svg:width="2.5425in" draw:z-index="10"><draw:text-box fo:min-height="1.4055in"><text:p text:style-name="P15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55"><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dekadske brojeve u binarne, a dekadski brojevi se u njega upisuju koristeći UART, a isto tako se iz UART-a čitaju binarni brojevi koji su rezultati. </text:span><text:span text:style-name="T414">Decimal to Binary</text:span><text:span text:style-name="T415"> najkompliciraniji je PicoBlaze program koji </text:span><text:span text:style-name="T416">do tada bio</text:span><text:span text:style-name="T415"> napravio, ima 283 retka.</text:span><text:span text:style-name="T32"> </text:span><text:span text:style-name="T417">Decimal to Binary</text:span><text:span text:style-name="T418"> je sada drugi po redu s lijeva </text:span><text:span text:style-name="T415">u popisu primjera </text:span><text:span text:style-name="T419">u simulatoru </text:span><text:span text:style-name="T420">(da ne prestrašim početnike, koji će najvjerojatnije prvo kliknuti prvi </text:span><text:span text:style-name="T421">primjer</text:span><text:span text:style-name="T420"> s lijeva)</text:span><text:span text:style-name="T418">.</text:span></text:p>
      <text:p text:style-name="P156"/>
      <text:p text:style-name="P156"><draw:frame draw:style-name="fr2" draw:name="Frame3" text:anchor-type="char" svg:width="2.5965in" draw:z-index="8"><draw:text-box fo:min-height="1.5402in"><text:p text:style-name="P15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57">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22">Tako da trebate taj program kao primjer korištenja UART-a na PicoBlazeu uzeti </text:span><text:span text:style-name="T423">cum grano salis</text:span><text:span text:style-name="T422">. </text:span><text:span text:style-name="T424">Dodao sam upozorenje o tome na početak tog programa </text:span><text:span text:style-name="T425">i otvorio pitanje o tome na nekoliko internetskih foruma, ali do sada nisam naletio na nekog stručnjaka za PicoBlaze na </text:span><text:span text:style-name="T426">nekom</text:span><text:span text:style-name="T425"> internetskom forumu </text:span><text:span text:style-name="T427">(a nije pomoglo to što moderatori nisu baš bili oduševljeni mojim pitanjem, s programom od skoro 300 redaka u kojem ne znam ni otprilike gdje bi se nalazila greška)</text:span><text:span text:style-name="T425">. </text:span><text:span text:style-name="T428">Kao što sam napisao dok sam opisivao </text:span><text:span text:style-name="T429">simulator.js</text:span><text:span text:style-name="T428">, imam dobar razlog za vjerovati da je emulacija regbanksova u mom simulatoru PicoBlazea nerealistična, ali program </text:span><text:span text:style-name="T430">Decimal to Binary</text:span><text:span text:style-name="T428"> ne koristi regbankse, tako da nije u tome problem. </text:span><text:span text:style-name="T431">Korisnik StackExchangea </text:span><text:span text:style-name="T432">Sep Roland</text:span><text:span text:style-name="T432"><text:note text:id="ftn35" text:note-class="footnote"><text:note-citation>35</text:note-citation><text:note-body><text:p text:style-name="P67">https://codereview.stackexchange.com/questions/253951/converting-decimal-to-binary-in-assembly/253978#253978</text:p></text:note-body></text:note></text:span><text:span text:style-name="T431"> ima neke negativne komentare na moj primjer programa </text:span><text:span text:style-name="T432">Decimal to Binary</text:span><text:span text:style-name="T431"> koji nisu vezani za to radi li taj program na pravom PicoBlazeu. Jedan od njegovih pri</text:span><text:span text:style-name="T433">govora je</text:span><text:span text:style-name="T431"> da </text:span><text:span text:style-name="T434">Decimal to Binary</text:span><text:span text:style-name="T431"> ima mnogo nepotrebnih provjera ispravnosti. Kako on kaže, „</text:span><text:span text:style-name="T435">Your ‘basic sanity checks’ are more of ‘insanity’ checks.</text:span><text:span text:style-name="T431">”, „</text:span><text:span text:style-name="T432">Tvoje provjere ispravnosti više su provjere ludosti.</text:span><text:span text:style-name="T431">”. On tvrdi da sve te provjere ispravnosti ne samo da usporavaju program i čine ga teško čitljivim ljudima, nego da možda i povećavaju rizik od pogreške </text:span><text:span text:style-name="T436">(Što ako taj kôd koji provjerava je li se dogodila greška zapravo pogrešan, i prekine izvođenje programa iako se zapravo greška koju on traži nije dogodila?)</text:span><text:span text:style-name="T431">. </text:span><text:span text:style-name="T433">Slično mi je i netko na Redditu rekao za moj compiler koji prevodi AEC na WebAssembly: „</text:span><text:span text:style-name="T434">Ti kažeš da taj tvoj compiler ima 5'500 redaka, ali oko 50% toga jesu iste ili slične provjere i poruke o pogrešci nakon kojih slijedi naredba </text:span><text:span text:style-name="T437">exit(1)</text:span><text:span text:style-name="T434">, a u ostatku je hrpa bacanja iznimki. Mrzio bih raditi u timu s nekim tko piše takve programe.</text:span><text:span text:style-name="T43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8">vector</text:span><text:span text:style-name="T433"> bacala iznimku. Međutim, nije, nego je program radio ispravno na Linuxu i Windowsima, a na FreeBSD-u je izazivao </text:span><text:span text:style-name="T434">segmentation fault</text:span><text:span text:style-name="T434"><text:note text:id="ftn36" text:note-class="footnote"><text:note-citation>36</text:note-citation><text:note-body><text:p text:style-name="P67">https://github.com/FlatAssembler/AECforWebAssembly/issues/3</text:p></text:note-body></text:note></text:span><text:span text:style-name="T433">. Da sam dodao još koju naoko-besmislenu provjeru u parser </text:span><text:span text:style-name="T439">za moj programski jezik</text:span><text:span text:style-name="T433">, t</text:span><text:span text:style-name="T440">o </text:span><text:span text:style-name="T433">mi se ne bi dogodilo. </text:span><text:span text:style-name="T440">I mislim da nije moguće da se pogreška zbog koje </text:span><text:span text:style-name="T441">Decimal to Binary</text:span><text:span text:style-name="T440"> ne radi na pravom PicoBlazeu nalazi u tim </text:span><text:span text:style-name="T441">sanity checkingsima</text:span><text:span text:style-name="T440">, jer </text:span><text:span text:style-name="T441">sanity checkingsi</text:span><text:span text:style-name="T440"> u </text:span><text:span text:style-name="T441">Decimal to Binary</text:span><text:span text:style-name="T440">, </text:span><text:span text:style-name="T442">ukoliko detektiraju pogrešku, pozivaju proceduru abort koja ispisuje „</text:span><text:span text:style-name="T443">ERROR!</text:span><text:span text:style-name="T442">” prije nego što upadne u beskonačnu petlju. Da je greška u nekom od tih </text:span><text:span text:style-name="T443">sanity checkingsa</text:span><text:span text:style-name="T442">, ispisao bi se „</text:span><text:span text:style-name="T443">ERROR!</text:span><text:span text:style-name="T442">”, ne bi bilo da PicoBlaze ne reagira ni na što na </text:span><text:span text:style-name="T444">UART</text:span><text:span text:style-name="T442"> terminalu (kao što je bilo kad sam pokušao pokrenuti </text:span><text:span text:style-name="T443">Decimal to Binary</text:span><text:span text:style-name="T442"> na pravom PicoBlazeu).</text:span></text:p>
      <text:p text:style-name="P158">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59"><text:span text:style-name="Source_20_Text"><text:span text:style-name="T39">regbank a</text:span></text:span></text:p>
      <text:p text:style-name="Preformatted_20_Text"><text:span text:style-name="Source_20_Text"><text:span text:style-name="T257">load s0, 0</text:span></text:span></text:p>
      <text:p text:style-name="Preformatted_20_Text"><text:span text:style-name="Source_20_Text"><text:span text:style-name="T257">sub <text:s/>s0, 0</text:span></text:span></text:p>
      <text:p text:style-name="Preformatted_20_Text"><text:span text:style-name="Source_20_Text"><text:span text:style-name="T257">regbank b</text:span></text:span></text:p>
      <text:p text:style-name="Preformatted_20_Text"><text:span text:style-name="Source_20_Text"><text:span text:style-name="T257">load s0, 1</text:span></text:span></text:p>
      <text:p text:style-name="Preformatted_20_Text"><text:span text:style-name="Source_20_Text"><text:span text:style-name="T257">sub <text:s/>s0, 0</text:span></text:span></text:p>
      <text:p text:style-name="Preformatted_20_Text"><text:span text:style-name="Source_20_Text"><text:span text:style-name="T257">regbank a</text:span></text:span></text:p>
      <text:p text:style-name="Preformatted_20_Text"><text:span text:style-name="Source_20_Text"><text:span text:style-name="T257">jump z , success</text:span></text:span></text:p>
      <text:p text:style-name="P160"><text:soft-page-break/><text:span text:style-name="Source_20_Text"><text:span text:style-name="T257">jump nz, failure</text:span></text:span></text:p>
      <text:p text:style-name="P161"><text:span text:style-name="T445">N</text:span><text:span text:style-name="T262">aredba „</text:span><text:span text:style-name="T125">regbank a</text:span><text:span text:style-name="T262">” znači „</text:span><text:span text:style-name="T446">Postavi regbanku A kao trenutnu regbanku.</text:span><text:span text:style-name="T262">” (</text:span><text:span text:style-name="T125">regbank</text:span><text:span text:style-name="T262"> je ovdje mnemonika, glagol, a ne imenica). Naredba „</text:span><text:span text:style-name="T125">load s0, 0</text:span><text:span text:style-name="T262">” znači „</text:span><text:span text:style-name="T446">Učitaj u registar </text:span><text:span text:style-name="T447">s0</text:span><text:span text:style-name="T446">, u trenutnoj regbanki, broj 0.</text:span><text:span text:style-name="T262">”. U dijalektima asemblera koji ciljaju na ugrađene sustave (</text:span><text:span text:style-name="T446">embedded systems</text:span><text:span text:style-name="T262">) za učitavanje vrijednosti u registar obično se koristi mnemonika </text:span><text:span text:style-name="T446">load</text:span><text:span text:style-name="T262"> (engleska riječ za </text:span><text:span text:style-name="T446">učitati</text:span><text:span text:style-name="T262">), a u asemblerskim dijalektima koji ciljaju PC-e i mobitele obično se koristi mnemonika </text:span><text:span text:style-name="T446">mov</text:span><text:span text:style-name="T262"> (od latinskog </text:span><text:span text:style-name="T446">movere</text:span><text:span text:style-name="T262">, </text:span><text:span text:style-name="T446">premjestiti</text:span><text:span text:style-name="T262">). Naredba „</text:span><text:span text:style-name="T125">sub s0, 0</text:span><text:span text:style-name="T262">” znači „</text:span><text:span text:style-name="T446">Oduzmi vrijednost 0 od registra </text:span><text:span text:style-name="T447">s0</text:span><text:span text:style-name="T446">.</text:span><text:span text:style-name="T262">”, mnemonika </text:span><text:span text:style-name="T125">sub</text:span><text:span text:style-name="T262"> dolazi od latinske riječi za </text:span><text:span text:style-name="T446">oduzeti</text:span><text:span text:style-name="T262">, </text:span><text:span text:style-name="T446">subtrahere</text:span><text:span text:style-name="T262">, od </text:span><text:span text:style-name="T446">sub</text:span><text:span text:style-name="T262"> (ispod) i </text:span><text:span text:style-name="T446">trahere</text:span><text:span text:style-name="T262"> (vući). Ako se nakon izvršenja te naredbe u registru nalazi vrijednost nula (kao u ovom slučaju), zastavica </text:span><text:span text:style-name="T125">z</text:span><text:span text:style-name="T262"> u trenutnoj regbanki postavlja se u jedinicu. Naredba „</text:span><text:span text:style-name="T125">regbank b</text:span><text:span text:style-name="T262">”, naravno, znači „</text:span><text:span text:style-name="T446">Postavi regbanku B kao trenutnu regbanku.</text:span><text:span text:style-name="T262">”. Zatim se u registar </text:span><text:span text:style-name="T125">s0</text:span><text:span text:style-name="T262"> učitava vrijednost 1, pa, kad se ponovno izvrti naredba „</text:span><text:span text:style-name="T125">sub s0, 0</text:span><text:span text:style-name="T262">”, zastavica </text:span><text:span text:style-name="T125">z</text:span><text:span text:style-name="T262"> postavlja se u nulu (a ne u jedinicu, kao zadnji put). Zatim se vraćamo u regbanku A i ispitujemo je li zastavica </text:span><text:span text:style-name="T125">z</text:span><text:span text:style-name="T262"> postavljena u jedinicu ili u nulu.</text:span></text:p>
      <text:p text:style-name="P162"><text:span text:style-name="T445">N</text:span><text:span text:style-name="T262">a koji će label skočiti </text:span><text:span text:style-name="T448">(</text:span><text:span text:style-name="T449">jump</text:span><text:span text:style-name="T448">)</text:span><text:span text:style-name="T262"> nakon što se izvrti taj dio programa? Ako sam ja u pravu, i u PicoBlazeu postoje zasebne zastavice (</text:span><text:span text:style-name="T446">flags</text:span><text:span text:style-name="T262">) za svaki regbank </text:span><text:span text:style-name="T450">(kao na Z80)</text:span><text:span text:style-name="T262">, skočit će na label </text:span><text:span text:style-name="T125">success</text:span><text:span text:style-name="T262">. </text:span><text:span text:style-name="T450">Ako je profesor Ivan Aleksi u pravu, i u oba rebanksa na PicoBlazeu koriste se iste zastavice, skočit će na label </text:span><text:span text:style-name="T451">failure</text:span><text:span text:style-name="T450">. U mom simulatoru, naravno, skače na </text:span><text:span text:style-name="T451">success</text:span><text:span text:style-name="T450">. </text:span><text:span text:style-name="T452">Program </text:span><text:span text:style-name="T453">Regbanks-Flags Test</text:span><text:span text:style-name="T452"> ispisuje svoje rezultate na UART, a, u slučaju da to ne upali, označava ih i LED-icama. </text:span><text:span text:style-name="T454">Kada idući put budem imao pristup PicoBlazeu, isprobat ću taj program na njemu. </text:span><text:span text:style-name="T455">Većina ljudi koji su mi se javili na internetskim forumima misli da je profesor Ivan Aleksi u pravu, ali nitko nije dao uvjerljiv dokaz (recimo, snimku zaslona UART terminala PicoBlazea kad se na njemu pokrene taj moj program </text:span><text:span text:style-name="T456">Regbanks-Flags Test</text:span><text:span text:style-name="T455">).</text:span><text:span text:style-name="T454"> Program </text:span><text:span text:style-name="T457">Regbanks-Flags Test</text:span><text:span text:style-name="T454"> dodan je na kraj, kao 7. primjer.</text:span></text:p>
      <text:p text:style-name="P163"><text:span text:style-name="T454">N</text:span><text:span text:style-name="T262">ekoliko tjedana nakon što sam napisao </text:span><text:span text:style-name="T446">Regbanks-Flags Test</text:span><text:span text:style-name="T262">, znatno sam unaprijedio pretprocesor svog asemblera za PicoBlaze, pa sam napisao primjer </text:span><text:span text:style-name="T446">Preprocessor Test</text:span><text:span text:style-name="T262">. Program </text:span><text:span text:style-name="T446">Preprocessor Test</text:span><text:span text:style-name="T262"> za vrijeme asembliranja koristeći </text:span><text:span text:style-name="T125">if</text:span><text:span text:style-name="T262">-</text:span><text:span text:style-name="T125">else</text:span><text:span text:style-name="T262">-grananja i </text:span><text:span text:style-name="T125">while</text:span><text:span text:style-name="T262">-petlji izračunava brojeve u Fibonaccijevom nizu manje od 100 i ispisuje ih na terminal koristeći novododanu naredbu </text:span><text:span text:style-name="T125">display</text:span><text:span text:style-name="T262"> (koju sam preuzeo iz FlatAssemblera). </text:span><text:span text:style-name="T458">Program </text:span><text:span text:style-name="T459">Preprocessor Test</text:span><text:span text:style-name="T458"> ne sadrži mnemonike </text:span><text:span text:style-name="T460">i ne prevodi se ni u kakav strojni kod. </text:span><text:span text:style-name="T461">On je dodan na kraj, kao 8. primjer.</text:span></text:p>
      <text:p text:style-name="P163"/>
      <text:p text:style-name="P163"><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2C437D5C.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64"><text:span text:style-name="T462">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63">N Queens Puzzle</text:span><text:span text:style-name="T464">. Program Binary to Octal pretvara binarne brojeve u oktalne, te ispisuje oktalne brojeve na sedam-segmentnim displejima, koristeći algoritam koji se uči na Digitalnoj elektronici: grupiraj </text:span><text:span text:style-name="T465">binarne znamenke u grupe po tri počevši od posljednje, i prevedi svaku grupu na oktalni posebno. To, makar zvučalo trivijalno, nije trivijalno za izvesti. Evo kako sam to napravio:</text:span></text:p>
      <text:p text:style-name="P165">;So, here goes the core of the algorithm.</text:p>
      <text:p text:style-name="P165">;It's supposed to take s0 as the input,</text:p>
      <text:p text:style-name="P165">;the binary digits 00ABCDEF, and store</text:p>
      <text:p text:style-name="P165">;into sa the result 0ABC0DEF.</text:p>
      <text:p text:style-name="P165">load sa, 0</text:p>
      <text:p text:style-name="P165"><text:soft-page-break/>load s3, 0</text:p>
      <text:p text:style-name="P165">beginning_of_the_loop:</text:p>
      <text:p text:style-name="P165"><text:s text:c="2"/>compare s3, 2 * 3 + 1 ;Six binary digits</text:p>
      <text:p text:style-name="P165"><text:s text:c="24"/>;plus one step with</text:p>
      <text:p text:style-name="P165"><text:s text:c="24"/>;the special case.</text:p>
      <text:p text:style-name="P165"><text:s text:c="2"/>jump nc, end_of_the_loop</text:p>
      <text:p text:style-name="P165"><text:s text:c="2"/>compare s3, 3</text:p>
      <text:p text:style-name="P165"><text:s text:c="2"/>jump nz, not_the_special_case</text:p>
      <text:p text:style-name="P165"><text:s text:c="4"/>;The fourth time, do nothing except</text:p>
      <text:p text:style-name="P165"><text:s text:c="4"/>;shifting sa to the right and</text:p>
      <text:p text:style-name="P165"><text:s text:c="4"/>;increasing the counter.</text:p>
      <text:p text:style-name="P165"><text:s text:c="4"/>sr0 sa</text:p>
      <text:p text:style-name="P165"><text:s text:c="4"/>add s3, 1</text:p>
      <text:p text:style-name="P165"><text:s text:c="4"/>jump beginning_of_the_loop</text:p>
      <text:p text:style-name="P165"><text:s text:c="2"/>not_the_special_case:</text:p>
      <text:p text:style-name="P165"><text:s text:c="4"/>sr0 s0</text:p>
      <text:p text:style-name="P165"><text:s text:c="4"/>sra sa</text:p>
      <text:p text:style-name="P165"><text:s text:c="4"/>add s3, 1</text:p>
      <text:p text:style-name="P165"><text:s text:c="2"/>jump beginning_of_the_loop</text:p>
      <text:p text:style-name="P165">end_of_the_loop:</text:p>
      <text:p text:style-name="P165">sr0 sa</text:p>
      <text:p text:style-name="P166"><text:span text:style-name="T262">Program Permutations Algorithm čita niz znakova s UART-a te abecednim redom na UART ispisuje permutacije tog niza znakova. Kao algoritam sortiranja koristio sam Bubble Sort, a za permutacije sam koristio stog umjesto rekurzije. </text:span><text:span text:style-name="T466">I to je najkompliciraniji program koji sam napisao na PicoBlaze asembleru, </text:span><text:span text:style-name="T467">ima 395 redaka</text:span><text:span text:style-name="T466">.</text:span></text:p>
      <text:p text:style-name="P167"><draw:frame draw:style-name="fr8" draw:name="Frame9" text:anchor-type="as-char" svg:width="5.1508in" draw:z-index="31"><draw:text-box fo:min-height="2.5583in"><text:p text:style-name="Slika"><draw:frame draw:style-name="fr3" draw:name="Image17" text:anchor-type="paragraph" svg:width="5.1508in" style:rel-width="100%" svg:height="2.5583in" style:rel-height="scale" draw:z-index="32"><draw:image xlink:href="Pictures/100000010000026A0000013346490012.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68">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7" text:note-class="footnote"><text:note-citation>37</text:note-citation><text:note-body><text:p text:style-name="P67">https://www.reddit.com/r/asm/comments/1qlxfrw/how_it_is_that_relying_on_an_input_array_being/?utm_source=share&amp;utm_medium=web3x&amp;utm_name=web3xcss&amp;utm_term=1&amp;utm_content=share_button</text:p></text:note-body></text:note>.</text:p>
      <text:p text:style-name="P169"><text:span text:style-name="T465">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8">On je dodan na kraj flexboxa. Jako je spor, vrti se nekoliko sati na mom računalu dok ne pronađe svih 92 rješenja. </text:span><text:span text:style-name="T469">Ima 335 redaka koda.</text:span></text:p>
      <text:p text:style-name="P170"><text:soft-page-break/><text:span text:style-name="T469">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71">;Let's set all the digits of the ordinal number of permutations to "0"</text:p>
      <text:p text:style-name="P171">regbank b</text:p>
      <text:p text:style-name="P171">load s0, digits_of_the_ordinal_number</text:p>
      <text:p text:style-name="P171">load s2, digits_of_the_ordinal_number ;End of the digits of the ordinal number.</text:p>
      <text:p text:style-name="P171">reset_ordinal_numbers_loop:</text:p>
      <text:p text:style-name="P171"><text:s text:c="2"/>compare s0, bottom_of_the_stack</text:p>
      <text:p text:style-name="P171"><text:s text:c="2"/>jump nc, end_of_the_reset_ordinal_numbers_loop</text:p>
      <text:p text:style-name="P171"><text:s text:c="2"/>load s1, "0"</text:p>
      <text:p text:style-name="P171"><text:s text:c="2"/>store s1, (s0)</text:p>
      <text:p text:style-name="P171"><text:s text:c="2"/>add s0, 1</text:p>
      <text:p text:style-name="P171"><text:s text:c="2"/>jump reset_ordinal_numbers_loop</text:p>
      <text:p text:style-name="P171">end_of_the_reset_ordinal_numbers_loop:</text:p>
      <text:p text:style-name="P171">regbank a</text:p>
      <text:p text:style-name="P172">I onda, kada nađe novo rješenje, radi ovo:</text:p>
      <text:p text:style-name="P171"><text:s text:c="4"/>regbank b</text:p>
      <text:p text:style-name="P171"><text:s text:c="4"/>call print_the_ordinal_number_message</text:p>
      <text:p text:style-name="P171"><text:s text:c="4"/>load s1, digits_of_the_ordinal_number</text:p>
      <text:p text:style-name="P171"><text:s text:c="4"/>increasing_the_ordinal_number_loop:</text:p>
      <text:p text:style-name="P171"><text:s text:c="6"/>fetch s0, (s1)</text:p>
      <text:p text:style-name="P171"><text:s text:c="6"/>add s0, 1</text:p>
      <text:p text:style-name="P171"><text:s text:c="6"/>store s0, (s1)</text:p>
      <text:p text:style-name="P171"><text:s text:c="6"/>compare s0, "9" + 1</text:p>
      <text:p text:style-name="P171"><text:s text:c="6"/>jump nz, end_of_increasing_the_ordinal_number_loop</text:p>
      <text:p text:style-name="P171"><text:s text:c="6"/>load s0, "0"</text:p>
      <text:p text:style-name="P171"><text:s text:c="6"/>store s0, (s1)</text:p>
      <text:p text:style-name="P171"><text:s text:c="6"/>add s1, 1</text:p>
      <text:p text:style-name="P171"><text:s text:c="6"/>jump increasing_the_ordinal_number_loop</text:p>
      <text:p text:style-name="P171"><text:s text:c="4"/>end_of_increasing_the_ordinal_number_loop:</text:p>
      <text:p text:style-name="P171"><text:s text:c="4"/>compare s1, s2</text:p>
      <text:p text:style-name="P171"><text:s text:c="4"/>jump c, not_a_new_digit</text:p>
      <text:p text:style-name="P171"><text:s text:c="6"/>load s2, s1</text:p>
      <text:p text:style-name="P171"><text:s text:c="4"/>not_a_new_digit:</text:p>
      <text:p text:style-name="P171"><text:s text:c="4"/>load s1, s2</text:p>
      <text:p text:style-name="P171"><text:s text:c="4"/>printing_the_ordinal_number:</text:p>
      <text:p text:style-name="P171"><text:s text:c="6"/>fetch s9, (s1)</text:p>
      <text:p text:style-name="P171"><text:s text:c="6"/>call UART_TX</text:p>
      <text:p text:style-name="P171"><text:s text:c="6"/>sub s1, 1</text:p>
      <text:p text:style-name="P171"><text:s text:c="6"/>compare s1, digits_of_the_ordinal_number</text:p>
      <text:p text:style-name="P171"><text:s text:c="6"/>jump nc, printing_the_ordinal_number</text:p>
      <text:p text:style-name="P171"><text:s text:c="4"/>end_of_printing_the_ordinal_number:</text:p>
      <text:p text:style-name="P171"><text:s text:c="4"/>load s9, a'x</text:p>
      <text:p text:style-name="P171"><text:s text:c="4"/>call UART_TX</text:p>
      <text:p text:style-name="P171"><text:s text:c="4"/>regbank a</text:p>
      <text:p text:style-name="P172">Taj sam algoritam smislio jer broj permutacija lako može biti veći od 256 (najveći broj koji se može prikazati jednim byteom), a pretvaranje višebajtnih binarnih brojeva u dekadski je noćna mora.</text:p>
      <text:p text:style-name="P173">Isprobao sam N Queens Puzzle u simulatoru OpbSim pisanom u programskom jeziku Nim, i radio je tamo:</text:p>
      <text:p text:style-name="P173"><text:soft-page-break/><draw:frame draw:style-name="fr7" draw:name="Image19" text:anchor-type="as-char" svg:width="6.6929in" svg:height="3.4409in" draw:z-index="33"><draw:image xlink:href="Pictures/10000000000005CA000002FAFBFB53BA.jpg" xlink:type="simple" xlink:show="embed" xlink:actuate="onLoad" draw:mime-type="image/jpeg"/></draw:frame></text:p>
      <text:p text:style-name="P173">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74">Kasnije je u repozitorij dodana i datoteka nQueensPuzzle.asm koja predstavlja implementaciju tog istog algoritma u x86 assemblerskom jeziku kompatibilnim s FlatAssemblerom.</text:p>
      <text:p text:style-name="P175">U verziji v5.9.2 dodan je i primjer programa koji crta fraktal zvan Trokut Sierpinskog:</text:p>
      <text:p text:style-name="P175"><draw:frame draw:style-name="fr1" draw:name="Image20" text:anchor-type="as-char" svg:width="5.15in" svg:height="3.1335in" draw:z-index="34"><draw:image xlink:href="Pictures/100000000000026A0000017842F2DD0B.png" xlink:type="simple" xlink:show="embed" xlink:actuate="onLoad" draw:mime-type="image/png"/></draw:frame></text:p>
      <text:p text:style-name="P176"><text:span text:style-name="T462">Nakon tih </text:span><text:span text:style-name="T186">1</text:span><text:span text:style-name="T404">2</text:span><text:span text:style-name="T4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70">To sam dodao jer m</text:span><text:span text:style-name="T471">islim da bi danas svaki programer trebao znati osnove x86 asemblerskog koda </text:span><text:span text:style-name="T472">(asemblerski kod računala na kojem radi i za kojeg pravi programe)</text:span><text:span text:style-name="T470">, </text:span><text:span text:style-name="T473">da znati PicoBlaze asemblerski kôd nije zamjena za to</text:span><text:span text:style-name="T471">.</text:span><text:span text:style-name="T462"> Analogni sat pisan onim dijalektom mog programskog jezika koji cilja WebAssembly može se pokrenuti u </text:span><text:span text:style-name="T474">modernom</text:span><text:span text:style-name="T462"> internetskom pregledniku</text:span><text:span text:style-name="T462"><text:note text:id="ftn38" text:note-class="footnote"><text:note-citation>38</text:note-citation><text:note-body><text:p text:style-name="P67">https://flatassembler.github.io/analogClock.html</text:p></text:note-body></text:note></text:span><text:span text:style-name="T462">, ali pokrenuti onaj drugi je znatno kompliciranije, </text:span><text:span text:style-name="T470">i zato sam linkao na upute </text:span><text:span text:style-name="T475">kako to napraviti na Linuxu (a upute kako to napraviti na Windowsima nalaze se u ZIP arhivi)</text:span><text:span text:style-name="T462">. Compiler za moj programski jezik koji cilja na x86 ispisuje asemblerski kôd kompatibilan s i486, ali se onaj analogni sat zbog naredbi koje koristim u umetnutom asemblerskom kodu </text:span><text:span text:style-name="T476">(</text:span><text:span text:style-name="T477">movzx</text:span><text:span text:style-name="T476">...)</text:span><text:span text:style-name="T462"> ne može pokrenuti na i486, nego samo na i586 i </text:span><text:soft-page-break/><text:span text:style-name="T462">novijima (dakle, recimo, može u DosBoxu, danas najčešće korištenom simulatoru DOS-a). </text:span><text:span text:style-name="T476">Kad sam pisao program </text:span><text:span text:style-name="T477">roseForDOS.aec</text:span><text:span text:style-name="T476">, pazio sam da u umetnuti asembler ne ubacim ni jednu instrukciju nekompatibilnu s i486, tako da </text:span><text:span text:style-name="T478">bi</text:span><text:span text:style-name="T476"> se </text:span><text:span text:style-name="T477">roseForDOS.aec</text:span><text:span text:style-name="T476"> iz te ZIP arhive </text:span><text:span text:style-name="T478">trebao moći</text:span><text:span text:style-name="T476"> pokrenuti na i486 </text:span><text:span text:style-name="T478">(iako nisam isprobao)</text:span><text:span text:style-name="T476">.</text:span><text:span text:style-name="T4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76"/>
      <text:p text:style-name="P176"><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ED475D3.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77">I, nakon ta dva linka, u flexboxu s primjerima, slijede link na GitHub i Reddit gdje me se može kontaktirati u vezi s tim PicoBlaze Simulatorom (recimo, ako imamo novi primjer koji želimo dodati). Naime, na Redditu sam otvorio subreddit o PicoBlazeu.</text:p>
      <text:p text:style-name="P177">Tako da u flexboxu s primjerima ima ukupno <text:span text:style-name="T480">1</text:span><text:span text:style-name="T481">4</text:span> divova: <text:span text:style-name="T481">dv</text:span><text:span text:style-name="T480">anaest</text:span> primjera PicoBlaze programa i dva diva s linkovima. <text:span text:style-name="T482">U slučaju da netko taj moj PicoBlaze simulator pokuša pokrenuti u internetskom pregledniku u kojem se JavaScript ne uspije izvrtjeti, u tom flexboxu nalazi se poruka o tome i link na web-stranicu TOR Browsera. </text:span><text:span text:style-name="T483">TOR Browser, naime, koristi SpiderMonkey compiler za JavaScript, koji je poznat po tome da najbolje optimizira kod, znatno bolje nego V8 (koj</text:span><text:span text:style-name="T484">i</text:span><text:span text:style-name="T483"> koristi Chrome), a važno mi je da se JavaScript u mom PicoBlaze simulatoru dobro optimizira, jer se pri simulaciji mnogo puta izvršava isti JavaScript. </text:span><text:span text:style-name="T480">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80"><text:note text:id="ftn39" text:note-class="footnote"><text:note-citation>39</text:note-citation><text:note-body><text:p text:style-name="P67">https://www.reddit.com/r/firefox/comments/18icm8l/why_does_firefox_52_seem_to_run_javascript_faster/?utm_source=share&amp;utm_medium=web2x&amp;context=3</text:p></text:note-body></text:note></text:span><text:span text:style-name="T480">.</text:span></text:p>
      <text:p text:style-name="P147"/>
      <text:p text:style-name="P148">Mane simuliranja PicoBlazea u JavaScriptu</text:p>
      <text:p text:style-name="P178"><text:soft-page-break/><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5">Korisnik foruma </text:span><text:span text:style-name="T486">atheistforums.org</text:span><text:span text:style-name="T487"> </text:span><text:span text:style-name="T488">zvan</text:span><text:span text:style-name="T489"> </text:span><text:span text:style-name="T487">bennyboy</text:span><text:span text:style-name="T485"> predložio mi je da pregledam primjere dobrog web-dizajna na web-stranici CSS frameworka Bootstrap, da me možda to inspirira da napravim dobar dizajn za svoj PicoBlaze Simulator koji je lagan za implementirati na webu</text:span><text:span text:style-name="T485"><text:note text:id="ftn40" text:note-class="footnote"><text:note-citation>40</text:note-citation><text:note-body><text:p text:style-name="P67">https://atheistforums.org/thread-61911-post-2113649.html#pid2113649</text:p></text:note-body></text:note></text:span><text:span text:style-name="T485">.</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0"><text:note text:id="ftn41" text:note-class="footnote"><text:note-citation>41</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79"><text:span text:style-name="T22">Korisnik foruma </text:span><text:span text:style-name="T125">atheistforums.org</text:span><text:span text:style-name="T22"> zvan </text:span><text:span text:style-name="T7">bennyboy</text:span><text:span text:style-name="T22"> ima dvije ideje kako ubrzati moj program. On misli da potprogram </text:span><text:span text:style-name="T125">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2" text:note-class="footnote"><text:note-citation>42</text:note-citation><text:note-body><text:p text:style-name="P67">https://atheistforums.org/thread-61911-post-2112572.html#pid2112572</text:p></text:note-body></text:note></text:span><text:span text:style-name="T22">. On također misli da bih u </text:span><text:span text:style-name="T125">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90">;</text:span><text:span text:style-name="T22"> </text:span><text:span text:style-name="T490">M</text:span><text:span text:style-name="T22">eni to, </text:span><text:span text:style-name="T490">kao nekome tko je napravio compiler za svoj programski jezik,</text:span><text:span text:style-name="T22"> nema previše smisla)</text:span><text:span text:style-name="T22"><text:note text:id="ftn43" text:note-class="footnote"><text:note-citation>43</text:note-citation><text:note-body><text:p text:style-name="P67">https://atheistforums.org/thread-61911-post-2112817.html#pid2112817</text:p></text:note-body></text:note></text:span><text:span text:style-name="T22">. </text:span><text:span text:style-name="T490">Bilo bi zanimljivo dati si truda i provjeriti te teze. </text:span><text:span text:style-name="T489">HappySkeptic</text:span><text:span text:style-name="T488"> je pokušao analizirati performanse mog PicoBlaze simulatora dok se vrti program </text:span><text:span text:style-name="T489">Decimal to Binary</text:span><text:span text:style-name="T488"> pomoću Chromeovih alata za programiranje i došao je do zaključka da on provodi više od 99% </text:span><text:span text:style-name="T491">svog</text:span><text:span text:style-name="T488"> vremena crtajući SVG dijagrame</text:span><text:span text:style-name="T488"><text:note text:id="ftn44" text:note-class="footnote"><text:note-citation>44</text:note-citation><text:note-body><text:p text:style-name="P67">https://atheistforums.org/thread-61911-post-2113176.html#pid2113176</text:p></text:note-body></text:note></text:span><text:span text:style-name="T488"> </text:span><text:span text:style-name="T491">(koji su, naravno, za program </text:span><text:span text:style-name="T492">Decimal to Binary</text:span><text:span text:style-name="T491"> beskorisni, jer program </text:span><text:span text:style-name="T492">Decimal to Binary</text:span><text:span text:style-name="T491"> koristi UART za komunikaciju s korisnikom, a ne prekidače, LED-ice ili 7-segmentne pokaznike, koji se prikazuju SVG-ovima)</text:span><text:span text:style-name="T488">. </text:span><text:span text:style-name="T493">U tom bi se slučaju moj simulator PicoBlazea, barem za programe kao što je </text:span><text:span text:style-name="T494">Decimal to Binary</text:span><text:span text:style-name="T493">, mogao znatno ubrzati tako da omogućimo korisniku da </text:span><text:span text:style-name="T494">disable</text:span><text:span text:style-name="T493">a SVG-ove, kao što se sada može </text:span><text:span text:style-name="T494">disable</text:span><text:span text:style-name="T493">ati UART.</text:span><text:span text:style-name="T488"> </text:span><text:span text:style-name="T493">No,</text:span><text:span text:style-name="T488"> </text:span><text:span text:style-name="T493">m</text:span><text:span text:style-name="T49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6">što se vrti</text:span><text:span text:style-name="T495"> u Chromeu.</text:span></text:p>
      <text:p text:style-name="P179"><text:span text:style-name="T497">30. kolovoza </text:span><text:span text:style-name="T498">2023. godine korisnik GitHuba </text:span><text:span text:style-name="T499">agustiza</text:span><text:span text:style-name="T498"> dijagnosticirao je problem kao </text:span><text:span text:style-name="T499">layout trashing</text:span><text:span text:style-name="T498">.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9">Fibonacci Sequence </text:span><text:span text:style-name="T498">izvrti se za oko 60 sekundi, a u njegovoj verziji 5 sekundi. </text:span><text:span text:style-name="T500">U planu je</text:span><text:span text:style-name="T498"> spojiti njegovu i moju verziju tog mog programa. </text:span><text:span text:style-name="T501">For the time being</text:span><text:span text:style-name="T500">, dodan je checkbox kojim korisnik može </text:span><text:soft-page-break/><text:span text:style-name="T500">onemogućiti da se tablica s registrima i zastavicama osvježava na svaku instrukciju. Time ga se može ubrzati oko 2 puta (ne baš 12 puta, ali nešto ubrzanja bolje je nego nimalo).</text:span></text:p>
      <text:p text:style-name="P180"><text:span text:style-name="T490">B</text:span><text:span text:style-name="T22">udući da je moj simulator PicoBlazea neprihvatljivo spor ako se pokrene na mobilnom telefonu, razmišljao sam o tome da pokušam napraviti Android aplikaciju gdje će simulator biti pisan u Javi </text:span><text:span text:style-name="T502">(</text:span><text:span text:style-name="T503">dakle, da ponovno napišem </text:span><text:span text:style-name="T504">simulator.js</text:span><text:span text:style-name="T503">, ali ne u JavaScriptu, nego u Javi</text:span><text:span text:style-name="T502">)</text:span><text:span text:style-name="T22">. Java isto nije idealan jezik za pisanje simulatora (sakupljanje smeća...), ali neki uspješni simulatori ipak jesu pisani u Javi (jDosbox...), jer je Java ipak brža nego JavaScript </text:span><text:span text:style-name="T502">(</text:span><text:span text:style-name="T503">statičko tipiranje...</text:span><text:span text:style-name="T502">)</text:span><text:span text:style-name="T22">. Tako da sam pokušao napraviti native Android aplikaciju koja će omogućiti mobitelu da se pretvara da je PicoBlaze, dijelom i zato da se okušam kakav bih bio razvijatelj aplikacija za mobitele. </text:span><text:span text:style-name="T505">Prvo što sam</text:span><text:span text:style-name="T22"> uz mnogo truda uspio napraviti je da asembler pisan u JavaScriptu </text:span><text:span text:style-name="T503">(</text:span><text:span text:style-name="T504">assembler.js</text:span><text:span text:style-name="T503">, </text:span><text:span text:style-name="T504">parser.js</text:span><text:span text:style-name="T503">, </text:span><text:span text:style-name="T504">preprocessor.js</text:span><text:span text:style-name="T503">, </text:span><text:span text:style-name="T504">tokenizer.js</text:span><text:span text:style-name="T503"> i </text:span><text:span text:style-name="T504">TreeNode.js</text:span><text:span text:style-name="T503">)</text:span><text:span text:style-name="T22"> i </text:span><text:span text:style-name="T503">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505">a onda sam na više godina odustao od te ideje</text:span><text:span text:style-name="T22">. </text:span><text:span text:style-name="T505">Kad se pojavila napredna umjetna inteligencija početkom 2026. godine, zadao sam GitHub Copilotu da prepiše moju datoteku </text:span><text:span text:style-name="T506">simulator.js</text:span><text:span text:style-name="T505"> iz JavaScripta u Javu. Rezultat je bio upotrebljiv, pa sam to upotrijebio da napravim assembler i emulator za PicoBlaze koji se može vrtjeti na Androidu.</text:span></text:p>
      <text:p text:style-name="P174"><draw:frame draw:style-name="fr9" draw:name="Image26" text:anchor-type="as-char" svg:y="-4.3252in" svg:width="1.9717in" svg:height="4.2717in" draw:z-index="35"><draw:image xlink:href="Pictures/100000000000043800000924420DCDEA.jpg" xlink:type="simple" xlink:show="embed" xlink:actuate="onLoad" draw:mime-type="image/jpeg"/></draw:frame><text:s/><draw:frame draw:style-name="fr9" draw:name="Image27" text:anchor-type="as-char" svg:y="-4.3252in" svg:width="1.9681in" svg:height="4.2638in" draw:z-index="36"><draw:image xlink:href="Pictures/100000000000043800000924D0962648.jpg" xlink:type="simple" xlink:show="embed" xlink:actuate="onLoad" draw:mime-type="image/jpeg"/></draw:frame><text:s/><draw:frame draw:style-name="fr10" draw:name="Image28" text:anchor-type="as-char" svg:y="-4.3244in" svg:width="1.9681in" svg:height="4.2634in" draw:z-index="37"><draw:image xlink:href="Pictures/1000000000000438000009242B4D8846.jpg" xlink:type="simple" xlink:show="embed" xlink:actuate="onLoad" draw:mime-type="image/jpeg"/></draw:frame></text:p>
      <text:p text:style-name="P174"><text:soft-page-break/><draw:frame draw:style-name="fr1" draw:name="Image29" text:anchor-type="as-char" svg:width="1.8398in" svg:height="3.9862in" draw:z-index="38"><draw:image xlink:href="Pictures/1000000000000438000009248EAC15DC.jpg" xlink:type="simple" xlink:show="embed" xlink:actuate="onLoad" draw:mime-type="image/jpeg"/></draw:frame><text:s/><draw:frame draw:style-name="fr1" draw:name="Image30" text:anchor-type="as-char" svg:width="1.8535in" svg:height="4.0161in" draw:z-index="39"><draw:image xlink:href="Pictures/10000000000004380000092482D4C96E.jpg" xlink:type="simple" xlink:show="embed" xlink:actuate="onLoad" draw:mime-type="image/jpeg"/></draw:frame></text:p>
      <text:p text:style-name="P180"><text:span text:style-name="T507">Mnogi na internetskim forumima kažu da, kad se s razvoja desktop ili mobilnih aplikacija prebaciš na razvoj web-aplikacija, kao da si se vratio dva desetljeća u prošlost. </text:span><text:span text:style-name="T508">Meni se ne čini da je tako. </text:span><text:span text:style-name="T50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10">machineCode</text:span><text:span text:style-name="T509">, strojnim kodom u heksadekadskom obliku i linijama asemblerskog koda odakle dolaze naredbe) već </text:span><text:span text:style-name="T511">je</text:span><text:span text:style-name="T509"> podjednako teško na mobitelu i na webu. </text:span><text:span text:style-name="T512">A dohvatiti nešto s interneta ili parsirati JSON daleko je lakše na webu nego na mobitelu.</text:span></text:p>
      <text:p text:style-name="P181">Najveći problem na koji sam naletio pri pravljenju Android aplikacije bilo je da se u Register Dump activityju pokazuje PC registar, koji je isti za oba regbanka, pa bi za njega imalo smisla napraviti da mu, u rječniku HTML-a, colspan bude jednak dvojci. Ovako:</text:p>
      <text:p text:style-name="P181"><text:soft-page-break/><draw:frame draw:style-name="fr1" draw:name="Image31" text:anchor-type="as-char" svg:width="2.3311in" svg:height="5.0508in" draw:z-index="40"><draw:image xlink:href="Pictures/1000000000000438000009240D7035A6.jpg" xlink:type="simple" xlink:show="embed" xlink:actuate="onLoad" draw:mime-type="image/jpeg"/></draw:frame></text:p>
      <text:p text:style-name="P181">To sam, na prijedlog GitHub Copilota, riješio tako da postavim WeightSum od LinearLayouta na tri u XML-u, i zatim za svaki table cell s nazivom Regbank A i Regbank B dohvaća LayoutConstraints, i ako je to Regbank A u PC-u, postavlja mu Weight na 2 i vraća ga sa setLayoutConstraints, i zatim Regbank B postavi visibility na GONE, a inače weight postavlja na jedinicu, a visibility od Regbank B na VISIBLE. Ovako:</text:p>
      <text:p text:style-name="P182">if (position == 17) {</text:p>
      <text:p text:style-name="P182"/>
      <text:p text:style-name="P182"><text:s text:c="8"/>holder.getRegisterNameView().setText("PC");</text:p>
      <text:p text:style-name="P182"><text:s text:c="8"/>holder.getRegbankAView().setText(String.format("%03x", simulator.PC));</text:p>
      <text:p text:style-name="P182"><text:s text:c="8"/>LinearLayout.LayoutParams params = (LinearLayout.LayoutParams) holder.getRegbankAView().getLayoutParams();</text:p>
      <text:p text:style-name="P182"><text:s text:c="8"/>params.weight = 2;</text:p>
      <text:p text:style-name="P182"><text:s text:c="8"/>holder.getRegbankAView().setLayoutParams(params);</text:p>
      <text:p text:style-name="P182"><text:s text:c="8"/>holder.getRegbankBView().setVisibility(View.GONE);</text:p>
      <text:p text:style-name="P182"><text:s text:c="12"/>holder.getRegisterNameView().setTypeface(null, NORMAL);</text:p>
      <text:p text:style-name="P182"><text:s text:c="12"/>holder.getRegbankAView().setTypeface(null, NORMAL);</text:p>
      <text:p text:style-name="P182"><text:s text:c="12"/>holder.getRegbankBView().setTypeface(null, NORMAL);</text:p>
      <text:p text:style-name="P182"><text:s text:c="8"/>return;</text:p>
      <text:p text:style-name="P182"><text:s text:c="8"/>}</text:p>
      <text:p text:style-name="P182"><text:s text:c="8"/>else {</text:p>
      <text:p text:style-name="P182"><text:s text:c="12"/>LinearLayout.LayoutParams params = (LinearLayout.LayoutParams) holder.getRegbankAView().getLayoutParams();</text:p>
      <text:p text:style-name="P182"><text:s text:c="12"/>params.weight = 1;</text:p>
      <text:p text:style-name="P182"><text:s text:c="12"/>holder.getRegbankAView().setLayoutParams(params);</text:p>
      <text:p text:style-name="P182"><text:s text:c="12"/>holder.getRegbankBView().setVisibility(View.VISIBLE);</text:p>
      <text:p text:style-name="P182"><text:s text:c="8"/>}</text:p>
      <text:p text:style-name="P183">Android aplikacija može se downloadati sa SourceForgea<text:note text:id="ftn45" text:note-class="footnote"><text:note-citation>45</text:note-citation><text:note-body><text:p text:style-name="P67">https://sourceforge.net/projects/picoblaze-android/files/latest/download</text:p></text:note-body></text:note>.</text:p>
      <text:p text:style-name="P147"><text:soft-page-break/></text:p>
      <text:p text:style-name="P148">Zahvale</text:p>
      <text:p text:style-name="P184">Posebno zahvaljujem profesoru Ivanu Aleksiju što me potakao da ovo napravim i što je sakupio informacije na internetu potrebne za to. <text:span text:style-name="T51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84">Zahvaljujem i programerima koji su napravili internetski servis LGTM, statički analizer za JavaScript koji me je upozorio na neke greške koje sam napravio. JavaScript je relativno loš programski jezik i takvi su alati korisni.</text:p>
      <text:p text:style-name="P185">Također se zahvaljujem korisniku GitHuba zvanom <text:span text:style-name="T47">agustiza</text:span> što je otkrio i ispravio bug u jezgri simulatora, te što izrađuje automatske testove da olakša posao budućim doprinositeljima ovom projektu. <text:span text:style-name="T514">Zahvaljujem se i Abidinu Durduu abdrd-u što je napravio back-end.</text:span></text:p>
      <text:p text:style-name="P186"><text:span text:style-name="T515">I zahvaljujem GitHubu što hosta moju web-stranicu </text:span><text:span text:style-name="T516">(uključujući i PicoBlaze Simulator)</text:span><text:span text:style-name="T515">, i još me nije zabranio zbog govora mržnje. </text:span><text:span text:style-name="T517">Prije je moju web-stranicu hostala ciparska tvrtka 000webhost, pa su me zabranili zbog govora mržnje. </text:span><text:span text:style-name="T516">Za slučaj da me i GitHub zabrani, ovaj PicoBlaze Simulator hosta se i na SourceForgeu</text:span><text:span text:style-name="T516"><text:note text:id="ftn46" text:note-class="footnote"><text:note-citation>46</text:note-citation><text:note-body><text:p text:style-name="P187">https://picoblaze-simulator.sourceforge.io/</text:p></text:note-body></text:note></text:span><text:span text:style-name="T516">, ali na SourceForgeu ne </text:span><text:span text:style-name="T518">p</text:span><text:span text:style-name="T516">ostam ništa kontroverzno zbog čega bi me imali razloga zabraniti. </text:span><text:span text:style-name="T519">Ako me GitHub zabrani, onih </text:span><text:span text:style-name="T520">osam</text:span><text:span text:style-name="T519"> primjera neće biti dostupno ni na SourceForgeu, jer ih i PicoBlaze Simulator koji se vrti na SourceForgeu dohvaća s mog GitHub profila. Ali mislim da će to biti lagano srediti u tom slučaju.</text:span></text:p>
      <text:p text:style-name="P188">SourceForge mi, za razliku od GitHuba, dopušta da na njihovim serverima vrtim PHP. <text:span text:style-name="T514">I Abidin Durdu je napravio back-end koji omogućuje korisnicima da dijele vlastite PicoBlaze asemblerske programe, na čemu mu najviše zahvaljujem.</text:span></text:p>
      <text:p text:style-name="P189"><text:span text:style-name="T521">Abstract: </text:span><text:span text:style-name="T522">The author of the text was frustrated by the shortcomings of existing</text:span><text:span text:style-name="T357"> </text:span><text:span text:style-name="T523">simulators of the small computer called</text:span><text:span text:style-name="T357"> </text:span><text:span text:style-name="T522">PicoBlaze, </text:span><text:span text:style-name="T523">so he</text:span><text:span text:style-name="T522"> created a different PicoBlaze simulator in the JavaScript programming language. This simulator can be run in modern Internet browsers</text:span><text:span text:style-name="T522"><text:note text:id="ftn47" text:note-class="footnote"><text:note-citation>47</text:note-citation><text:note-body><text:p text:style-name="P190">https://flatassembler.github.io/PicoBlaze/PicoBlaze.html</text:p></text:note-body></text:note></text:span><text:span text:style-name="T522"> (the author thinks that the oldest Internet browser in which the simulator works properly is Firefox 52, the last version of Firefox that can</text:span><text:span text:style-name="T357"> </text:span><text:span text:style-name="T523">be</text:span><text:span text:style-name="T357"> </text:span><text:span text:style-name="T522">run on Windows XP, </text:span><text:span text:style-name="T524">and it is also the version of Firefox that comes with Solaris 11.4, which is the latest version of Solaris today</text:span><text:span text:style-name="T522">). The text </text:span><text:span text:style-name="T523">explains</text:span><text:span text:style-name="T522"> the details of how the author made his simulator and what the advantages and disadvantages</text:span><text:span text:style-name="T357"> </text:span><text:span text:style-name="T523">are</text:span><text:span text:style-name="T357"> </text:span><text:span text:style-name="T522">of that simulator compared to</text:span><text:span text:style-name="T357"> </text:span><text:span text:style-name="T525">the</text:span><text:span text:style-name="T357"> </text:span><text:span text:style-name="T522">existing simulators.</text:span><text:span text:style-name="T357"> </text:span><text:span text:style-name="T526">The author is also comparing the parts of the simulator with similar parts of other programs he has made earlier (mostly a compiler that compiles his programming language to WebAssembly).</text:span><text:span text:style-name="T357"> </text:span><text:span text:style-name="T522">No frameworks were used, the code was written mainly in VIM (for minor changes) and Eclipse (for major changes), GIMP and Inkscape were used for image editing, programming tools</text:span><text:span text:style-name="T357"> </text:span><text:span text:style-name="T525">that come with Firefox</text:span><text:span text:style-name="T357"> </text:span><text:span text:style-name="T522">were used for</text:span><text:span text:style-name="T357"> </text:span><text:span text:style-name="T525">debugging the program,</text:span><text:span text:style-name="T357"> </text:span><text:span text:style-name="T522">and the</text:span><text:span text:style-name="T357"> </text:span><text:span text:style-name="T527">(no longer available)</text:span><text:span text:style-name="T357"> </text:span><text:span text:style-name="T522">LGTM internet service </text:span><text:span text:style-name="T525">was also used to search for errors</text:span><text:span text:style-name="T522">. Prettier (for HTML and CSS) and ClangFormat (for JavaScript) were used to format the code. </text:span><text:span text:style-name="T528">The last version I </text:span><text:span text:style-name="T529">made entirely by myself is v2.8.3. Not long after I released v2.8.3, I got a contributor who claims to be using my project at a university in Argentina, </text:span><text:span text:style-name="T530">called Agustin Izaguirre</text:span><text:span text:style-name="T529">. </text:span><text:span text:style-name="T530">Later I also got a contributor called Abidin Durdu from Turkey, who made a back-end using PHP and MySQL. </text:span><text:span text:style-name="T531">Later on I received contributions from a GitHub user Gb-JS, who is from Yorubaland in Nigeria. </text:span><text:span text:style-name="T532">And even more late I received contributions from Robert Kovač, my fellow FERIT student, known on GitHub as DuckySoLucky.</text:span></text:p>
      <text:p text:style-name="P191">Životopis</text:p>
      <text:p text:style-name="P19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93"><text:span text:style-name="T2">Često sam sudjelovao na informatičkim natjecanjima. U 6. razredu osnovne osvojio sam 3. mjesto na županijskom natjecanju</text:span><text:span text:style-name="T2"><text:note text:id="ftn48"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3</text:note-citation><text:note-body><text:p text:style-name="Footnote">https://www.azoo.hr/images/rezultati_klas_jezici_lat_gimnazije2016.pdf</text:p></text:note-body></text:note></text:span><text:span text:style-name="T2">.</text:span></text:p>
      <text:p text:style-name="P194"><text:span text:style-name="T533">Kad sam bio gimnazijalac, i</text:span><text:span text:style-name="T2">zdavačka kuća Panon izdala mi je knjigu pod naslovom </text:span><text:span text:style-name="T534">Jezici za gimnazijalce</text:span><text:span text:style-name="T534"><text:note text:id="ftn54" text:note-class="footnote"><text:note-citation>54</text:note-citation><text:note-body><text:p text:style-name="Footnote">http://www.glas-slavonije.hr/365330/3/Gimnazijalac-Teo-napisao--i-objavio-knjigu-o-jeziku</text:p></text:note-body></text:note></text:span><text:span text:style-name="T534">.</text:span><text:span text:style-name="T356"> </text:span><text:span text:style-name="T535">Knjiga</text:span><text:span text:style-name="T536"> Jezici za gimnazijalce</text:span><text:span text:style-name="T535"> ima dva dijela, prvi je o povijesnoj lingvistici, a drugi o vezi programskih i prirodnih jezika. </text:span><text:span text:style-name="T537">Naravno, sada i o jednom i o drugom znam mnogo više nego što sam znao kad sam pisao tu knjigu.</text:span><text:span text:style-name="T357"> </text:span><text:span text:style-name="T538">Ka</text:span><text:span text:style-name="T539">d sam bio</text:span><text:span text:style-name="T540"> student prve godine,</text:span><text:span text:style-name="T2"> sudjelovao </text:span><text:span text:style-name="T538">sam</text:span><text:span text:style-name="T2"> na konferenciji </text:span><text:span text:style-name="T534">Kopački Rit, Jučer, Danas, Sutra</text:span><text:span text:style-name="T2"> s prezentacijom </text:span><text:span text:style-name="T534">Toponimija Baranje u svjetlu novih promišljanja</text:span><text:span text:style-name="T534"><text:note text:id="ftn55" text:note-class="footnote"><text:note-citation>55</text:note-citation><text:note-body><text:p text:style-name="Footnote">https://bib.irb.hr/datoteka/957836.Kopacki.pdf</text:p></text:note-body></text:note></text:span><text:span text:style-name="T2">. 2022. godine napisao sam tekst </text:span><text:span text:style-name="T541">Etimologija Karašica</text:span><text:span text:style-name="T542">,</text:span><text:span text:style-name="T2"> o ideji da je to k-r što se ponavlja u nazivima rijeka u Hrvatskoj (Krka, Korana, Kravarščica, Krbavica, Krapina, dvije Karašice) </text:span><text:span text:style-name="T543">bila</text:span><text:span text:style-name="T2"> </text:span><text:span text:style-name="T543">ilirska riječ za</text:span><text:span text:style-name="T2"> </text:span><text:span text:style-name="T357">teći</text:span><text:span text:style-name="T356"> </text:span><text:span text:style-name="T535">(da je ilirska riječ za </text:span><text:span text:style-name="T536">teći</text:span><text:span text:style-name="T535"> bila </text:span><text:span text:style-name="T536">*karr</text:span><text:span text:style-name="T544">~kurr</text:span><text:span text:style-name="T545">, </text:span><text:span text:style-name="T535">recimo, da </text:span><text:span text:style-name="T546">ime</text:span><text:span text:style-name="T536"> </text:span><text:span text:style-name="T547">Karašica</text:span><text:span text:style-name="T535"> dolazi od ne</text:span><text:span text:style-name="T546">potvrđenog ilirskog imena koje se može rekonstruirati</text:span><text:span text:style-name="T535"> ili </text:span><text:span text:style-name="T546">kao</text:span><text:span text:style-name="T535"> </text:span><text:span text:style-name="T536">*Kurrurrissia</text:span><text:span text:style-name="T535"> ili </text:span><text:span text:style-name="T546">kao</text:span><text:span text:style-name="T535"> </text:span><text:span text:style-name="T536">*Kurrirrissia</text:span><text:span text:style-name="T535">, a </text:span><text:span text:style-name="T546">ime</text:span><text:span text:style-name="T535"> </text:span><text:span text:style-name="T536">Krapina</text:span><text:span text:style-name="T535"> </text:span><text:span text:style-name="T546">od </text:span><text:span text:style-name="T548">*Karpona</text:span><text:span text:style-name="T549"> ili, manje vjerojatno, od nečeg kao</text:span><text:span text:style-name="T535"> </text:span><text:span text:style-name="T536">*Kurrippuppona</text:span><text:span text:style-name="T535">, i tako dalje)</text:span><text:span text:style-name="T356">, on je objavljen u Valpovačkom godišnjaku </text:span><text:span text:style-name="T549">(što je spomenuto u Glasu Slavonije</text:span><text:span text:style-name="T356"><text:note text:id="ftn56"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50">http://www.glas-slavonije.hr/vijest.aspx?id=498689</text:span></text:span></text:a></text:p></text:note-body></text:note></text:span><text:span text:style-name="T549">)</text:span><text:span text:style-name="T356">, na mojoj web-stranici</text:span><text:span text:style-name="T356"><text:note text:id="ftn57" text:note-class="footnote"><text:note-citation>57</text:note-citation><text:note-body><text:p text:style-name="P195">https://flatassembler.github.io/Karasica.doc</text:p></text:note-body></text:note></text:span><text:span text:style-name="T35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96">Govorim hrvatski (izvorni govornik), engleski (vjerojatno C1 razina), latinski (vjerojatno B2 razina<text:note text:id="ftn58" text:note-class="footnote"><text:note-citation>58</text:note-citation><text:note-body><text:p text:style-name="P19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98">2023. godine diplomirao sam računarstvo na FERIT-u i time stekao titulu sveučilišnog prvostupnika inženjera računarstva.</text:p>
      <text:p text:style-name="P199"><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lef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19T19:15:16.169576600</dc:date>
    <meta:editing-duration>P1DT14H22M23S</meta:editing-duration>
    <meta:editing-cycles>368</meta:editing-cycles>
    <meta:generator>LibreOffice/26.2.2.2$Windows_X86_64 LibreOffice_project/1f77d10d6938fd34972958f64b2bcfa54f8b1ba5</meta:generator>
    <meta:document-statistic meta:table-count="2" meta:image-count="31" meta:object-count="0" meta:page-count="45" meta:paragraph-count="556" meta:word-count="21230" meta:character-count="142743" meta:non-whitespace-character-count="120811"/>
  </office:meta>
</office:document-meta>
</file>